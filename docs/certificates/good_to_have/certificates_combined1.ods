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7319in"/>
    </style:style>
    <style:style style:name="co2" style:family="table-column">
      <style:table-column-properties fo:break-before="auto" style:column-width="2.4543in"/>
    </style:style>
    <style:style style:name="co3" style:family="table-column">
      <style:table-column-properties fo:break-before="auto" style:column-width="2.4563in"/>
    </style:style>
    <style:style style:name="co4" style:family="table-column">
      <style:table-column-properties fo:break-before="auto" style:column-width="4.0807in"/>
    </style:style>
    <style:style style:name="co5" style:family="table-column">
      <style:table-column-properties fo:break-before="auto" style:column-width="4.3898in"/>
    </style:style>
    <style:style style:name="co6" style:family="table-column">
      <style:table-column-properties fo:break-before="auto" style:column-width="0.68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language-asian="none" style:country-asian="none" style:font-style-asian="normal" style:font-weight-asian="normal" style:font-name-complex="Helvetica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course_nam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skills_id</text:p>
          </table:table-cell>
          <table:table-cell office:value-type="string" calcext:value-type="string">
            <text:p>source_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8 Things You Must Know in Python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270cdef6e924b8c6c31420d881c7d2fc9e79b20803cad8b38a579e571c7570f9</text:p>
          </table:table-cell>
          <table:table-cell office:value-type="string" calcext:value-type="string">
            <text:p>CertificateOfCompletion_8 Things You Must Know in Python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8 Things You Must Know in Python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4de941048770ec5797fd41b03e3d551b5909f298fc9c4aec38358c515ab54b2f</text:p>
          </table:table-cell>
          <table:table-cell office:value-type="string" calcext:value-type="string">
            <text:p>CertificateOfCompletion_8 Things You Must Know in Pyth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I Data Strategy: Data Procurement and Storage</text:p>
          </table:table-cell>
          <table:table-cell office:value-type="string" calcext:value-type="string">
            <text:p>Data Engineering AI Strategy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3578e9ab41efbc656e3f1dc39d842d69200cf41d909ba5ee4a6c8115e14e9855</text:p>
          </table:table-cell>
          <table:table-cell office:value-type="string" calcext:value-type="string">
            <text:p>CertificateOfCompletion_AI Data Strategy Data Procurement and Storag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I Product Development: Secure by Design</text:p>
          </table:table-cell>
          <table:table-cell office:value-type="string" calcext:value-type="string">
            <text:p>Software Development Security Secure Coding AI Software Development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2653585b431c1faa597f97e67f9219621a5ae67fc526e894b3544b23f844007a</text:p>
          </table:table-cell>
          <table:table-cell office:value-type="string" calcext:value-type="string">
            <text:p>CertificateOfCompletion_AI Product Development Secure by Desig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I Product Development: Technical Feasibility and Prototyping</text:p>
          </table:table-cell>
          <table:table-cell office:value-type="string" calcext:value-type="string">
            <text:p>Prototyping AI Software Development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409b7ed1cad60cf2f94fee7472b8b18d6cc05ab665324cb8c315b15f28bda0b0</text:p>
          </table:table-cell>
          <table:table-cell office:value-type="string" calcext:value-type="string">
            <text:p>CertificateOfCompletion_AI Product Development Technical Feasibility and Prototyp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I Product Ideation: Principles and Practical Applications</text:p>
          </table:table-cell>
          <table:table-cell office:value-type="string" calcext:value-type="string">
            <text:p>Creative Ideation Artificial Intelligence for Design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0c9cab17564bff4fae8b118fc64d91cc93b49e16afab59560002c971b47e77c9</text:p>
          </table:table-cell>
          <table:table-cell office:value-type="string" calcext:value-type="string">
            <text:p>CertificateOfCompletion_AI Product Ideation Principles and Practical Applic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rtificial Intelligence Foundations: Machine Learning</text:p>
          </table:table-cell>
          <table:table-cell office:value-type="string" calcext:value-type="string">
            <text:p>Machine Learning Artificial Intelligence (AI) Artificial Intelligence Found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a33c31b0922f112affb3faf3300908e9e03921998a7f570928f52b604f18ec9</text:p>
          </table:table-cell>
          <table:table-cell office:value-type="string" calcext:value-type="string">
            <text:p>CertificateOfCompletion_Artificial Intelligence Foundations Machine Learn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rtificial Intelligence Foundations: Thinking Machines</text:p>
          </table:table-cell>
          <table:table-cell office:value-type="string" calcext:value-type="string">
            <text:p>Machine Learning Artificial Intelligence (AI) Artificial Intelligence Found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2df943cb64f6ab2946ed02189dcab043109f82bb0aa1e7c438a43749672050cd</text:p>
          </table:table-cell>
          <table:table-cell office:value-type="string" calcext:value-type="string">
            <text:p>CertificateOfCompletion_Artificial Intelligence Foundations Thinking Machin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lockchain Basics</text:p>
          </table:table-cell>
          <table:table-cell office:value-type="string" calcext:value-type="string">
            <text:p>Cryptocurrency Blockchain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9a063bc587cf65367223da4d4f109b58bb34191e4e4401a4946d0b2820576b39</text:p>
          </table:table-cell>
          <table:table-cell office:value-type="string" calcext:value-type="string">
            <text:p>CertificateOfCompletion_Blockchain Basic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lockchain Basics</text:p>
          </table:table-cell>
          <table:table-cell office:value-type="string" calcext:value-type="string">
            <text:p>Cryptocurrency Blockchai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f77062f41bce1bf1d98e10c547c6077da2fcdf17e63aeb922419297ab494c974</text:p>
          </table:table-cell>
          <table:table-cell office:value-type="string" calcext:value-type="string">
            <text:p>CertificateOfCompletion_Blockchain Basic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uilt-in Machine Learning in the Wolfram Language</text:p>
          </table:table-cell>
          <table:table-cell office:value-type="string" calcext:value-type="string">
            <text:p>Wolfram Language Machine Learning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f3074229495d84ccbbedb116bc69124ba9cb753bc62359c9c63fcc82964576f</text:p>
          </table:table-cell>
          <table:table-cell office:value-type="string" calcext:value-type="string">
            <text:p>CertificateOfCompletion_Builtin Machine Learning in the Wolfram Languag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ertified Entry-Level Python Programmer (PCEP-30-02) Cert Prep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4b10863a428aa5d5eda15e3d282ae5cdc120a01bb0ddc917f32c46ea7a13b4fe</text:p>
          </table:table-cell>
          <table:table-cell office:value-type="string" calcext:value-type="string">
            <text:p>CertificateOfCompletion_Certified EntryLevel Python Programmer PCEP3002 Cert Prep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esign Powered by Data: Getting Started with UX Web Analytics (2022)</text:p>
          </table:table-cell>
          <table:table-cell office:value-type="string" calcext:value-type="string">
            <text:p>Web Analytics User Experience Design (UED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b65cffd076b6f69e98749553331ae0713300097ce6ede0981f454fc4363b5b8b</text:p>
          </table:table-cell>
          <table:table-cell office:value-type="string" calcext:value-type="string">
            <text:p>CertificateOfCompletion_Design Powered by Data Getting Started with UX Web Analytics 202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igital Transformation Foundations</text:p>
          </table:table-cell>
          <table:table-cell office:value-type="string" calcext:value-type="string">
            <text:p>Digital Transformat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20e87bfe054e310df212ee9437b927664ce0914efbbbf836a8b9ee9ac75c3cc</text:p>
          </table:table-cell>
          <table:table-cell office:value-type="string" calcext:value-type="string">
            <text:p>CertificateOfCompletion_Digital Transformation Found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igital Transformation in Supply Chains</text:p>
          </table:table-cell>
          <table:table-cell office:value-type="string" calcext:value-type="string">
            <text:p>Digital Transformation Supply Chain Management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3cd5c02c4d573a278b84e984fb4961cd05017342e263dd3d8faa1b229698ab12</text:p>
          </table:table-cell>
          <table:table-cell office:value-type="string" calcext:value-type="string">
            <text:p>CertificateOfCompletion_Digital Transformation in Supply Chain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igital Transformation in Supply Chains</text:p>
          </table:table-cell>
          <table:table-cell office:value-type="string" calcext:value-type="string">
            <text:p>Digital Transformation Supply Chain Management</text:p>
          </table:table-cell>
          <table:table-cell office:value-type="string" calcext:value-type="string">
            <text:p>LinkedIn Learning PMI</text:p>
          </table:table-cell>
          <table:table-cell table:style-name="ce1" office:value-type="string" calcext:value-type="string">
            <text:p>e02d802ef21af12f1956e708f3f505da4db145ad07c73346dbb4c4bc5b2de5a3</text:p>
          </table:table-cell>
          <table:table-cell office:value-type="string" calcext:value-type="string">
            <text:p>CertificateOfCompletion_Digital Transformation in Supply Chains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igital Transformation in Supply Chains</text:p>
          </table:table-cell>
          <table:table-cell office:value-type="string" calcext:value-type="string">
            <text:p>Digital Transformation Supply Chain Management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d2cd7ac252c0925b76c2f627c4de4d92f2669f39515dae43596cc5e1bd40432</text:p>
          </table:table-cell>
          <table:table-cell office:value-type="string" calcext:value-type="string">
            <text:p>CertificateOfCompletion_Digital Transformation in Supply Chai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thics in the Age of Generative AI</text:p>
          </table:table-cell>
          <table:table-cell office:value-type="string" calcext:value-type="string">
            <text:p>Computer Ethics Generative AI Responsible AI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0b1808f9d5ff6fd7dadc155cc4768d142795e6770fc4e1d126cc2f7536b66630</text:p>
          </table:table-cell>
          <table:table-cell office:value-type="string" calcext:value-type="string">
            <text:p>CertificateOfCompletion_Ethics in the Age of Generative AI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thics in the Age of Generative AI</text:p>
          </table:table-cell>
          <table:table-cell office:value-type="string" calcext:value-type="string">
            <text:p>Computer Ethics Generative AI Responsible AI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5483465bc0adde49b3fe619d931410d9b50bf5b75f6f179706493f9a7a623c73</text:p>
          </table:table-cell>
          <table:table-cell office:value-type="string" calcext:value-type="string">
            <text:p>CertificateOfCompletion_Ethics in the Age of Generative AI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thics in the Age of Generative AI</text:p>
          </table:table-cell>
          <table:table-cell office:value-type="string" calcext:value-type="string">
            <text:p>Computer Ethics Generative AI Responsible AI</text:p>
          </table:table-cell>
          <table:table-cell office:value-type="string" calcext:value-type="string">
            <text:p>LinkedIn Learning PMI</text:p>
          </table:table-cell>
          <table:table-cell table:style-name="ce1" office:value-type="string" calcext:value-type="string">
            <text:p>d2a0c9788680267c41976d02fff08ebbced828936a2f295bc38ecdd3f174afb4</text:p>
          </table:table-cell>
          <table:table-cell office:value-type="string" calcext:value-type="string">
            <text:p>CertificateOfCompletion_Ethics in the Age of Generative AI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xcel Statistics Essential Training: 1</text:p>
          </table:table-cell>
          <table:table-cell office:value-type="string" calcext:value-type="string">
            <text:p>Statistics Microsoft Excel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0a186fe184c3e0dca6b904b5e6b2bc2b98800cc4a01d9f3aa2201cd2d2af0b6e</text:p>
          </table:table-cell>
          <table:table-cell office:value-type="string" calcext:value-type="string">
            <text:p>CertificateOfCompletion_Excel Statistics Essential Training 1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xcel Statistics Essential Training: 1</text:p>
          </table:table-cell>
          <table:table-cell office:value-type="string" calcext:value-type="string">
            <text:p>Statistics Microsoft Excel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14070e2e8118eaaeb036d90d251a42e55367ca1411240e46faec76c007c1b822</text:p>
          </table:table-cell>
          <table:table-cell office:value-type="string" calcext:value-type="string">
            <text:p>CertificateOfCompletion_Excel Statistics Essential Training 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xcel Statistics Essential Training: 2</text:p>
          </table:table-cell>
          <table:table-cell office:value-type="string" calcext:value-type="string">
            <text:p>Statistical Data Analysis Microsoft Excel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5f747d8eb255aeb4912a113338913c0c8e9101ec35108c3ce88aee6a84fc4930</text:p>
          </table:table-cell>
          <table:table-cell office:value-type="string" calcext:value-type="string">
            <text:p>CertificateOfCompletion_Excel Statistics Essential Training 2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xcel Statistics Essential Training: 2</text:p>
          </table:table-cell>
          <table:table-cell office:value-type="string" calcext:value-type="string">
            <text:p>Statistical Data Analysis Microsoft Excel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06ee6398632b2cb1e671f692b779f5d4cc4fc530a000c3ce8ea1ee5a2586481b</text:p>
          </table:table-cell>
          <table:table-cell office:value-type="string" calcext:value-type="string">
            <text:p>CertificateOfCompletion_Excel Statistics Essential Training 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earning Path completed by Iliya Angelov Radulov Jun 06, 2026 at 05:44PM UTC • 5 hours 48 minutes Top skills covered Statistical Analysis Machine Learning Linear Algebra Shea Hanson, Head of Learning Content Strategy Certificate ID: 86e8ae3aa9aadb48cf9ab6c333fcfd017d1555e1c350394be361585d80abd9d5</text:p>
          </table:table-cell>
          <table:table-cell office:value-type="string" calcext:value-type="string">
            <text:p>Statistical Analysis Machine Learning Linear Algebra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86e8ae3aa9aadb48cf9ab6c333fcfd017d1555e1c350394be361585d80abd9d5</text:p>
          </table:table-cell>
          <table:table-cell office:value-type="string" calcext:value-type="string">
            <text:p>CertificateOfCompletion_Foundational Math for Machine Learn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Functional Programming with Python</text:p>
          </table:table-cell>
          <table:table-cell office:value-type="string" calcext:value-type="string">
            <text:p>Functional Programming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97b9f243137f51b8133cf0de74c4cf002fc7cce8e95ab6457d0456b679e29cbe</text:p>
          </table:table-cell>
          <table:table-cell office:value-type="string" calcext:value-type="string">
            <text:p>CertificateOfCompletion_Functional Programming with Pyth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Generative AI for Business Leaders</text:p>
          </table:table-cell>
          <table:table-cell office:value-type="string" calcext:value-type="string">
            <text:p>AI for Business Generative AI for Management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22fc40e7ed5c5094a874e53a0f5ff75ede7df335c4ae91363783d7281a118cf3</text:p>
          </table:table-cell>
          <table:table-cell office:value-type="string" calcext:value-type="string">
            <text:p>CertificateOfCompletion_Generative AI for Business Leader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Governing Agentic AI Systems by All Tech Is Human</text:p>
          </table:table-cell>
          <table:table-cell office:value-type="string" calcext:value-type="string">
            <text:p>AI Agents AI Governance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1d8d7d56d3fc4157867bd5ecaaaa431882d099a8f3bd3afb07e28b5ed11d219c</text:p>
          </table:table-cell>
          <table:table-cell office:value-type="string" calcext:value-type="string">
            <text:p>CertificateOfCompletion_Governing Agentic AI Systems by All Tech Is Huma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ands-On Introduction: Python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4b49da55366c7e59081e4ebe0c4f3fb5a07b044fefc901abc7ef492f82ff720d</text:p>
          </table:table-cell>
          <table:table-cell office:value-type="string" calcext:value-type="string">
            <text:p>CertificateOfCompletion_HandsOn Introduction Pyth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ntroduction to Artificial Intelligence</text:p>
          </table:table-cell>
          <table:table-cell office:value-type="string" calcext:value-type="string">
            <text:p>AI Literacy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bdfb4c1cf355e535bc9f9a9c0293788959fb910c7e539f8f951211ef5487c81</text:p>
          </table:table-cell>
          <table:table-cell office:value-type="string" calcext:value-type="string">
            <text:p>CertificateOfCompletion_Introduction to Artificial Intelligence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ntroduction to Artificial Intelligence</text:p>
          </table:table-cell>
          <table:table-cell office:value-type="string" calcext:value-type="string">
            <text:p>AI Literacy Artificial Intelligence (AI)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16e9ce6b713699e5332b918e7518b3c5be64fea271df99b180d882a798863dc0</text:p>
          </table:table-cell>
          <table:table-cell office:value-type="string" calcext:value-type="string">
            <text:p>CertificateOfCompletion_Introduction to Artificial Intelligenc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ntroduction to Data Science</text:p>
          </table:table-cell>
          <table:table-cell office:value-type="string" calcext:value-type="string">
            <text:p>Data Science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57fda43c1ab9038ae108bd57055d490fbe4faf0ffc1495d41b5f62401bbdf236</text:p>
          </table:table-cell>
          <table:table-cell office:value-type="string" calcext:value-type="string">
            <text:p>CertificateOfCompletion_Introduction to Data Science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ntroduction to Data Science</text:p>
          </table:table-cell>
          <table:table-cell office:value-type="string" calcext:value-type="string">
            <text:p>Data Science</text:p>
          </table:table-cell>
          <table:table-cell office:value-type="string" calcext:value-type="string">
            <text:p>LinkedIn Learning PMI</text:p>
          </table:table-cell>
          <table:table-cell table:style-name="ce1" office:value-type="string" calcext:value-type="string">
            <text:p>5189ce4db4e82cad26c443042824a3dcad799f16183876161270e24809f09324</text:p>
          </table:table-cell>
          <table:table-cell office:value-type="string" calcext:value-type="string">
            <text:p>CertificateOfCompletion_Introduction to Data Scienc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oT Foundations: Fundamentals</text:p>
          </table:table-cell>
          <table:table-cell office:value-type="string" calcext:value-type="string">
            <text:p>Internet of Things (IoT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349e86f7c7969a6f1f574969d860c5f3b28897a198f70c420a4aa386b133b03</text:p>
          </table:table-cell>
          <table:table-cell office:value-type="string" calcext:value-type="string">
            <text:p>CertificateOfCompletion_IoT Foundations Fundamental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oT Foundations: Standards and Ecosystems</text:p>
          </table:table-cell>
          <table:table-cell office:value-type="string" calcext:value-type="string">
            <text:p>Internet of Things (IoT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68dd7738c7d8c19cfc73a6952d6c7dcfc85e5d28bf78016cdfbfad6a8ec02dd</text:p>
          </table:table-cell>
          <table:table-cell office:value-type="string" calcext:value-type="string">
            <text:p>CertificateOfCompletion_IoT Foundations Standards and Ecosystem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earning Linux Command Line (2023)</text:p>
          </table:table-cell>
          <table:table-cell office:value-type="string" calcext:value-type="string">
            <text:p>Linux System Administration CLI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9f4aa9c15a1f30cb0515979b2793d3d240f68a3b80843524577536b7f7cc7c69</text:p>
          </table:table-cell>
          <table:table-cell office:value-type="string" calcext:value-type="string">
            <text:p>CertificateOfCompletion_Learning Linux Command Line 2023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earning Python (2021)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f8dd7b6cc2a5414bba08e5431bcccf5ec24532ee5d278f7e20d0967e735a372e</text:p>
          </table:table-cell>
          <table:table-cell office:value-type="string" calcext:value-type="string">
            <text:p>CertificateOfCompletion_Learning Python 202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earning Python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c5be5f54967eaab97cf465ee5f604dc398750c54c979ee1a6e973f71b263c1c</text:p>
          </table:table-cell>
          <table:table-cell office:value-type="string" calcext:value-type="string">
            <text:p>CertificateOfCompletion_Learning Pyth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evel Up: Python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8ea0bbdc0adb0013baf52af91bb71d75965d33be95fd6929212726768da49485</text:p>
          </table:table-cell>
          <table:table-cell office:value-type="string" calcext:value-type="string">
            <text:p>CertificateOfCompletion_Level Up Pyth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everaging AI in Your Nonprofit Organization by Microsoft and NetHope</text:p>
          </table:table-cell>
          <table:table-cell office:value-type="string" calcext:value-type="string">
            <text:p>AI Readiness Non-profit Technology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7a09029387794d9a966a52e26a43aad5201d5409cb69e407dad7a05c8933a54</text:p>
          </table:table-cell>
          <table:table-cell office:value-type="string" calcext:value-type="string">
            <text:p>CertificateOfCompletion_Leveraging AI in Your Nonprofit Organization by Microsoft and NetHop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everaging AI in Your Nonprofit Role by Microsoft and NetHope</text:p>
          </table:table-cell>
          <table:table-cell office:value-type="string" calcext:value-type="string">
            <text:p>Non-profit Technology Artificial Intelligence (AI) Nonprofit Organiz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092a0eeead31501ba7b7da9e7298c28cddfbb8f69d16bc8684dc76f2d9b1fa8b</text:p>
          </table:table-cell>
          <table:table-cell office:value-type="string" calcext:value-type="string">
            <text:p>CertificateOfCompletion_Leveraging AI in Your Nonprofit Role by Microsoft and NetHop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achine Learning Foundations: Calculus</text:p>
          </table:table-cell>
          <table:table-cell office:value-type="string" calcext:value-type="string">
            <text:p>Machine Learning Calculus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0819951b167acba6231d420ec10ed9be52b7a65cf1762209ec0adfa93a9a627</text:p>
          </table:table-cell>
          <table:table-cell office:value-type="string" calcext:value-type="string">
            <text:p>CertificateOfCompletion_Machine Learning Foundations Calculu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achine Learning Foundations: Linear Algebra</text:p>
          </table:table-cell>
          <table:table-cell office:value-type="string" calcext:value-type="string">
            <text:p>Machine Learning Linear Algebra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5fe0bf0f6901971034ab69ad524d3d16b83f6a6d173fa887c99ea0858362dfb5</text:p>
          </table:table-cell>
          <table:table-cell office:value-type="string" calcext:value-type="string">
            <text:p>CertificateOfCompletion_Machine Learning Foundations Linear Algebra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achine Learning Foundations: Probability</text:p>
          </table:table-cell>
          <table:table-cell office:value-type="string" calcext:value-type="string">
            <text:p>Probability Machine Learning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3fdd7a57d6db7ea0d03bad36767605e00f6195b86a0480ae267a4c7761c4c531</text:p>
          </table:table-cell>
          <table:table-cell office:value-type="string" calcext:value-type="string">
            <text:p>CertificateOfCompletion_Machine Learning Foundations Probability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achine Learning Foundations: Probability</text:p>
          </table:table-cell>
          <table:table-cell office:value-type="string" calcext:value-type="string">
            <text:p>Probability Machine Learning Artificial Intelligence (AI)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32037157e86c284bd30afbced279cb9355997af6cc41c28f87b4b9fdd08866e0</text:p>
          </table:table-cell>
          <table:table-cell office:value-type="string" calcext:value-type="string">
            <text:p>CertificateOfCompletion_Machine Learning Foundations Probability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achine Learning Foundations: Statistics</text:p>
          </table:table-cell>
          <table:table-cell office:value-type="string" calcext:value-type="string">
            <text:p>Statistical Analysis Machine Learning Artificial Intelligence (AI)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6375fc9b84d5e59c660dfae8eaa4f2151b689827ebe860b7571f886f59774f1b</text:p>
          </table:table-cell>
          <table:table-cell office:value-type="string" calcext:value-type="string">
            <text:p>CertificateOfCompletion_Machine Learning Foundations Statistic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achine Learning Foundations: Statistics</text:p>
          </table:table-cell>
          <table:table-cell office:value-type="string" calcext:value-type="string">
            <text:p>Statistical Analysis Machine Learning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3c3d04d35f52009b679f519f9aa3aae3327c44e90d7b8fc9acf5fc354dad39af</text:p>
          </table:table-cell>
          <table:table-cell office:value-type="string" calcext:value-type="string">
            <text:p>CertificateOfCompletion_Machine Learning Foundations Statistic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achine Learning with Scikit-Learn</text:p>
          </table:table-cell>
          <table:table-cell office:value-type="string" calcext:value-type="string">
            <text:p>Machine Learning Scikit-Learn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88ebc61f20da861b49c9cbe42211c61cd9a41a59335bc5c15003d2c08fc3d9a4</text:p>
          </table:table-cell>
          <table:table-cell office:value-type="string" calcext:value-type="string">
            <text:p>CertificateOfCompletion_Machine Learning with ScikitLearn copy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achine Learning with scikit-learn</text:p>
          </table:table-cell>
          <table:table-cell office:value-type="string" calcext:value-type="string">
            <text:p>Machine Learning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9e55409fce6aa176bb758b43c02a562f53663f22d2e5dd9e0ded501eb76dad72</text:p>
          </table:table-cell>
          <table:table-cell office:value-type="string" calcext:value-type="string">
            <text:p>CertificateOfCompletion_Machine Learning with scikitlear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icrosoft Azure AI Essentials: Workloads and Machine Learning on Azure</text:p>
          </table:table-cell>
          <table:table-cell office:value-type="string" calcext:value-type="string">
            <text:p>Machine Learning Azure AI Foundry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42b15ad7dcb33e71d2f899fd5dde7631d9e6922e1f83841ea02063402aff35f1</text:p>
          </table:table-cell>
          <table:table-cell office:value-type="string" calcext:value-type="string">
            <text:p>CertificateOfCompletion_Microsoft Azure AI Essentials Workloads and Machine Learning on Azur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icrosoft Azure Essentials by Microsoft Press</text:p>
          </table:table-cell>
          <table:table-cell office:value-type="string" calcext:value-type="string">
            <text:p>Microsoft Azure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13c28b4fe5648b29692acb20868d962fd6feb432f463430aed797544b4ed386</text:p>
          </table:table-cell>
          <table:table-cell office:value-type="string" calcext:value-type="string">
            <text:p>CertificateOfCompletion_Microsoft Azure Essentials by Microsoft Pres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icrosoft Copilot Essentials by Microsoft Press</text:p>
          </table:table-cell>
          <table:table-cell office:value-type="string" calcext:value-type="string">
            <text:p>AI for Business Microsoft Copilot AI Productivity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dde1dbf33a538604f85c59dc1b770bbd5fe5d28d1811795d36c1f85b1b222f70</text:p>
          </table:table-cell>
          <table:table-cell office:value-type="string" calcext:value-type="string">
            <text:p>CertificateOfCompletion_Microsoft Copilot Essentials by Microsoft Pres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NumPy Essential Training: 1 Foundations of NumPy</text:p>
          </table:table-cell>
          <table:table-cell office:value-type="string" calcext:value-type="string">
            <text:p>NumPy Machine Learning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0d09fb15773d0ef57aa5119a7fd52aa0a515f0a873b56beec2d0726de942d65a</text:p>
          </table:table-cell>
          <table:table-cell office:value-type="string" calcext:value-type="string">
            <text:p>CertificateOfCompletion_NumPy Essential Training 1 Foundations of NumPy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NumPy Essential Training: 2 MatPlotlib and Linear Algebra Capabilities</text:p>
          </table:table-cell>
          <table:table-cell office:value-type="string" calcext:value-type="string">
            <text:p>NumPy Matplotlib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dfcaf7aa58234561a420494aa0bc0c61b89225c1c994f8431b4bc63885bbfaa0</text:p>
          </table:table-cell>
          <table:table-cell office:value-type="string" calcext:value-type="string">
            <text:p>CertificateOfCompletion_NumPy Essential Training 2 MatPlotlib and Linear Algebra Capabiliti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Operationalizing AI Governance: Strategy and Foundations by All Tech Is Human</text:p>
          </table:table-cell>
          <table:table-cell office:value-type="string" calcext:value-type="string">
            <text:p>AI Governance Artificial Intelligence (AI) Responsible AI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867ece1e3219af00c97c1ca865649ebbf61d65be40d8656cf15d1c5914a6c18c</text:p>
          </table:table-cell>
          <table:table-cell office:value-type="string" calcext:value-type="string">
            <text:p>CertificateOfCompletion_Operationalizing AI Governance Strategy and Foundations by All Tech Is Huma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actical A/B Testing</text:p>
          </table:table-cell>
          <table:table-cell office:value-type="string" calcext:value-type="string">
            <text:p>A/B Test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f0ddff5ebd9e1ac34c10ad41d00e032a3f5bda96a8907fbf86466f2bd101bb3f</text:p>
          </table:table-cell>
          <table:table-cell office:value-type="string" calcext:value-type="string">
            <text:p>CertificateOfCompletion_Practical AB Test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actical GitHub Actions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65ea8cefc23179ced0bdf34813dd01113da482d73c8b5606646ffc06cfe07fc</text:p>
          </table:table-cell>
          <table:table-cell office:value-type="string" calcext:value-type="string">
            <text:p>CertificateOfCompletion_Practical GitHub Ac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actical GitHub Code Search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d88b752e6b78301666beac5e7a3e0b98235a518bdff95933633c3246f1232512</text:p>
          </table:table-cell>
          <table:table-cell office:value-type="string" calcext:value-type="string">
            <text:p>CertificateOfCompletion_Practical GitHub Code Search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actical GitHub Copilot</text:p>
          </table:table-cell>
          <table:table-cell office:value-type="string" calcext:value-type="string">
            <text:p>GitHub GitHub Copilot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94add5ea762f01ae99d54ed4a195d88c1d961b969cf6bc3c682261a033c59599</text:p>
          </table:table-cell>
          <table:table-cell office:value-type="string" calcext:value-type="string">
            <text:p>CertificateOfCompletion_Practical GitHub Copilot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actical GitHub Project Management and Collaboration</text:p>
          </table:table-cell>
          <table:table-cell office:value-type="string" calcext:value-type="string">
            <text:p>GitHub Project Management</text:p>
          </table:table-cell>
          <table:table-cell office:value-type="string" calcext:value-type="string">
            <text:p>LinkedIn Learning PMI</text:p>
          </table:table-cell>
          <table:table-cell table:style-name="ce1" office:value-type="string" calcext:value-type="string">
            <text:p>a4a9da0e4eb7b5aea1180e2fbb92d42b22248d390a7eb24259dbf03ec4de28ca</text:p>
          </table:table-cell>
          <table:table-cell office:value-type="string" calcext:value-type="string">
            <text:p>CertificateOfCompletion_Practical GitHub Project Management and Collaboration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actical GitHub Project Management and Collaboration</text:p>
          </table:table-cell>
          <table:table-cell office:value-type="string" calcext:value-type="string">
            <text:p>GitHub Project Management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82fa1209d25d1090678c31af7f7924f239bfb68e8c4f7920094b776265b81a8d</text:p>
          </table:table-cell>
          <table:table-cell office:value-type="string" calcext:value-type="string">
            <text:p>CertificateOfCompletion_Practical GitHub Project Management and Collaborati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inciples of Responsible AI: Identifying, Understanding, and Mitigating Risks by All Tech Is Human</text:p>
          </table:table-cell>
          <table:table-cell office:value-type="string" calcext:value-type="string">
            <text:p>Artificial Intelligence (AI) Responsible AI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f3b9ee0b9b042b91e17bf0530c9beacba904c103631117ff9959a0ee41dca581</text:p>
          </table:table-cell>
          <table:table-cell office:value-type="string" calcext:value-type="string">
            <text:p>CertificateOfCompletion_Principles of Responsible AI Identifying Understanding and Mitigating Risks by All Tech Is Huma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bability Foundations for Data Science</text:p>
          </table:table-cell>
          <table:table-cell office:value-type="string" calcext:value-type="string">
            <text:p>Big Data Analytics Mathematical Analysis Statistic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16479adc6faae05807cece5f29f9816d2feb66763a2c10a88062016c4a594bf0</text:p>
          </table:table-cell>
          <table:table-cell office:value-type="string" calcext:value-type="string">
            <text:p>CertificateOfCompletion_Probability Foundations for Data Scienc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Beyond the Fundamentals</text:p>
          </table:table-cell>
          <table:table-cell office:value-type="string" calcext:value-type="string">
            <text:p>Programming Programming Found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9b446f7a760f87d6955af6d606c8e1c5373c74bacb481a66411edb7f740e296b</text:p>
          </table:table-cell>
          <table:table-cell office:value-type="string" calcext:value-type="string">
            <text:p>CertificateOfCompletion_Programming Foundations Beyond the Fundamental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Fundamentals</text:p>
          </table:table-cell>
          <table:table-cell office:value-type="string" calcext:value-type="string">
            <text:p>Programming Programming Found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429b0205147404ef2241b4b1bb408d9667615d31fad65084f54090d333b0ce55</text:p>
          </table:table-cell>
          <table:table-cell office:value-type="string" calcext:value-type="string">
            <text:p>CertificateOfCompletion_Programming Foundations Fundamental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Numerical Mathematics and Calculations</text:p>
          </table:table-cell>
          <table:table-cell office:value-type="string" calcext:value-type="string">
            <text:p>Programming Programming Foundations Numeric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4c3676816254bcac3f5401b801c2e2c5a0822446f329bf3e3c6f02b47c295e54</text:p>
          </table:table-cell>
          <table:table-cell office:value-type="string" calcext:value-type="string">
            <text:p>CertificateOfCompletion_Programming Foundations Numerical Mathematics and Calcul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Object- Oriented Design</text:p>
          </table:table-cell>
          <table:table-cell office:value-type="string" calcext:value-type="string">
            <text:p>Software Design Patterns Programming Foundations Object-Oriented Programming (OOP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3b309947fb81ae94a080d8fdbe694c801088b47308425b7ce0a787999ede750e</text:p>
          </table:table-cell>
          <table:table-cell office:value-type="string" calcext:value-type="string">
            <text:p>CertificateOfCompletion_Programming Foundations ObjectOriented Desig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Data Analysis (2020)</text:p>
          </table:table-cell>
          <table:table-cell office:value-type="string" calcext:value-type="string">
            <text:p>Data Analysis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dd0064abf87abfee5eb468cde8e6cf91457931e8cfa69accf2d65d2df6ac90e</text:p>
          </table:table-cell>
          <table:table-cell office:value-type="string" calcext:value-type="string">
            <text:p>CertificateOfCompletion_Python Data Analysis 2020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Data Analysis (2020)</text:p>
          </table:table-cell>
          <table:table-cell office:value-type="string" calcext:value-type="string">
            <text:p>Data Analysis Python (Programming Language)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4d046093141560cc979ae11a0f021715d877b64c6b49e7a392470cde70c46efc</text:p>
          </table:table-cell>
          <table:table-cell office:value-type="string" calcext:value-type="string">
            <text:p>CertificateOfCompletion_Python Data Analysis 2020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: Design Patterns</text:p>
          </table:table-cell>
          <table:table-cell office:value-type="string" calcext:value-type="string">
            <text:p>Design Patterns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7ca4cd73d9e9f900d63a2570fd0c10c6e967de5a400b8913a66b08a8d5a95268</text:p>
          </table:table-cell>
          <table:table-cell office:value-type="string" calcext:value-type="string">
            <text:p>CertificateOfCompletion_Python Design Patter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Essential Training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4a1258d9b7edb799735d0ad8983c537a6494f7a88fe65f1a1517a1c89f83da71</text:p>
          </table:table-cell>
          <table:table-cell office:value-type="string" calcext:value-type="string">
            <text:p>CertificateOfCompletion_Python Essential Train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Object-Oriented Programming</text:p>
          </table:table-cell>
          <table:table-cell office:value-type="string" calcext:value-type="string">
            <text:p>Python (Programming Language) Object-Oriented Programming (OOP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5019a7087da8c47e7d384db65627fc00bfc20ef519e13082e528d700312e822</text:p>
          </table:table-cell>
          <table:table-cell office:value-type="string" calcext:value-type="string">
            <text:p>CertificateOfCompletion_Python ObjectOriented Programm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Practice: Real-World Coding Challenges</text:p>
          </table:table-cell>
          <table:table-cell office:value-type="string" calcext:value-type="string">
            <text:p>Python (Programming Language) Coding Practice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738105cd728d7c4363d74c0172474ea35b767069e7f3409ad1b18b11ea4228d</text:p>
          </table:table-cell>
          <table:table-cell office:value-type="string" calcext:value-type="string">
            <text:p>CertificateOfCompletion_Python Practice RealWorld Coding Challeng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Responsible AI Framework for Your Enterprise AI Product</text:p>
          </table:table-cell>
          <table:table-cell office:value-type="string" calcext:value-type="string">
            <text:p>Artificial Intelligence (AI) Responsible AI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ffa0e18e2d4e7bf87afe15c2376471a46feacee40164e34e85e89aaef7d91a58</text:p>
          </table:table-cell>
          <table:table-cell office:value-type="string" calcext:value-type="string">
            <text:p>CertificateOfCompletion_Responsible AI Framework for Your Enterprise AI Product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tatistical Analysis with Wolfram Language</text:p>
          </table:table-cell>
          <table:table-cell office:value-type="string" calcext:value-type="string">
            <text:p>Wolfram Language Statistical Analysi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77e414529f9f6908c5499d3c5e02021f25933ebdf853fa08154f382d5e05197</text:p>
          </table:table-cell>
          <table:table-cell office:value-type="string" calcext:value-type="string">
            <text:p>CertificateOfCompletion_Statistical Analysis with Wolfram Languag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tatistics Foundations 1: The Basics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02bef2234d97a0db5d65adb7b780047e2bb3e15ec1e9069b5e43842d0f81e45a</text:p>
          </table:table-cell>
          <table:table-cell office:value-type="string" calcext:value-type="string">
            <text:p>CertificateOfCompletion_Statistics Foundations 1 The Basic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tatistics Foundations 1: The Basics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9f3d024eff24fdeee0895e271eb4d2f611b09d917adb20bbc2e6bd0d683b5df5</text:p>
          </table:table-cell>
          <table:table-cell office:value-type="string" calcext:value-type="string">
            <text:p>CertificateOfCompletion_Statistics Foundations 1 The Basic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tatistics Foundations 2: Probability</text:p>
          </table:table-cell>
          <table:table-cell office:value-type="string" calcext:value-type="string">
            <text:p>Probability Statistics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4f1dc718cc85789283b027aa055f11b2ac5db77fa6e9973dcf184a969d499b10</text:p>
          </table:table-cell>
          <table:table-cell office:value-type="string" calcext:value-type="string">
            <text:p>CertificateOfCompletion_Statistics Foundations 2 Probability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tatistics Foundations 2: Probability</text:p>
          </table:table-cell>
          <table:table-cell office:value-type="string" calcext:value-type="string">
            <text:p>Probability Statistic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af1842e6fda7c355fd22075c97bde748497824bf7f27dde578c34d00a33fb10</text:p>
          </table:table-cell>
          <table:table-cell office:value-type="string" calcext:value-type="string">
            <text:p>CertificateOfCompletion_Statistics Foundations 2 Probability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tatistics Foundations 3: Using Data Sets</text:p>
          </table:table-cell>
          <table:table-cell office:value-type="string" calcext:value-type="string">
            <text:p>Statistical Data Analysis Statistic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87392ae6a5cb17356217f5f0babe4b98ede730aabac9db1eca3e1b6b3e294735</text:p>
          </table:table-cell>
          <table:table-cell office:value-type="string" calcext:value-type="string">
            <text:p>CertificateOfCompletion_Statistics Foundations 3 Using Data Set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tatistics Foundations 3: Using Data Sets</text:p>
          </table:table-cell>
          <table:table-cell office:value-type="string" calcext:value-type="string">
            <text:p>Statistical Data Analysis Statistics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b13e6e9fa118dea418fb1e5094c70e3733dc63606a7ca6dd4439bed99692d79f</text:p>
          </table:table-cell>
          <table:table-cell office:value-type="string" calcext:value-type="string">
            <text:p>CertificateOfCompletion_Statistics Foundations 3 Using Data Set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tatistics Foundations 4: Advanced Topics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8cc6e84a02c2d2541c747ccf06857170ea7d790aaeb144d96299415f9fce9ad5</text:p>
          </table:table-cell>
          <table:table-cell office:value-type="string" calcext:value-type="string">
            <text:p>CertificateOfCompletion_Statistics Foundations 4 Advanced Topic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tatistics Foundations 4: Advanced Topics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e71e35bfb1c54c1256dc91dedd558341e48b5a117fc4fd0b01ba0e8e1328fc8</text:p>
          </table:table-cell>
          <table:table-cell office:value-type="string" calcext:value-type="string">
            <text:p>CertificateOfCompletion_Statistics Foundations 4 Advanced Topic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upply Chain Beyond the Basics: Building System Dynamics Models</text:p>
          </table:table-cell>
          <table:table-cell office:value-type="string" calcext:value-type="string">
            <text:p>Supply Chain Management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15fb066a6218098ea3b96acf149e666c4465f9625178f4c82a5aaf955404dda0</text:p>
          </table:table-cell>
          <table:table-cell office:value-type="string" calcext:value-type="string">
            <text:p>CertificateOfCompletion_Supply Chain Beyond the Basics Building System Dynamics Model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upply Chain Beyond the Basics: Leveraging Supply Chain Information Systems</text:p>
          </table:table-cell>
          <table:table-cell office:value-type="string" calcext:value-type="string">
            <text:p>Supply Chain Management Supply Chain Operations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882d8756bbacc6c0af8a9ca4a5b84ed222ab0677493ee083967efa8025068e28</text:p>
          </table:table-cell>
          <table:table-cell office:value-type="string" calcext:value-type="string">
            <text:p>CertificateOfCompletion_Supply Chain Beyond the Basics Leveraging Supply Chain Information System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upply Chain Beyond the Basics: Leveraging Supply Chain Information Systems</text:p>
          </table:table-cell>
          <table:table-cell office:value-type="string" calcext:value-type="string">
            <text:p>Supply Chain Management Supply Chain Oper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566f21016f160b5630fc887fc4bc0e0003eb5ee6e0d628c16233f2c015923c95</text:p>
          </table:table-cell>
          <table:table-cell office:value-type="string" calcext:value-type="string">
            <text:p>CertificateOfCompletion_Supply Chain Beyond the Basics Leveraging Supply Chain Information System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The Data Science of Experimental Design</text:p>
          </table:table-cell>
          <table:table-cell office:value-type="string" calcext:value-type="string">
            <text:p>Experimental Desig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f5c9b29414113c164e1c605f76d3138ff6f53100777d1a0c95ca87fff9730908</text:p>
          </table:table-cell>
          <table:table-cell office:value-type="string" calcext:value-type="string">
            <text:p>CertificateOfCompletion_The Data Science of Experimental Desig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Ubuntu Linux: Operating System Basics</text:p>
          </table:table-cell>
          <table:table-cell office:value-type="string" calcext:value-type="string">
            <text:p>Linux System Administration Ubuntu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931d751f805c74cef45b40f7f52716d30c692ec3c700467f0eff27ba7a568ddf</text:p>
          </table:table-cell>
          <table:table-cell office:value-type="string" calcext:value-type="string">
            <text:p>CertificateOfCompletion_Ubuntu Linux Operating System Basic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Ubuntu Linux: Storage Management</text:p>
          </table:table-cell>
          <table:table-cell office:value-type="string" calcext:value-type="string">
            <text:p>Linux System Administration Storage Management Ubuntu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7837c0d35e6ad05928b65e578838fde3f6adc31d900163c2ae5e8aaf965fd1b</text:p>
          </table:table-cell>
          <table:table-cell office:value-type="string" calcext:value-type="string">
            <text:p>CertificateOfCompletion_Ubuntu Linux Storage Management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Ubuntu Linux: User and Group Management</text:p>
          </table:table-cell>
          <table:table-cell office:value-type="string" calcext:value-type="string">
            <text:p>Linux System Administration User Management Ubuntu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316fd1c04fa500f8f7d69df533bfdc1127ad027141d72839c138e58c8d0b83f7</text:p>
          </table:table-cell>
          <table:table-cell office:value-type="string" calcext:value-type="string">
            <text:p>CertificateOfCompletion_Ubuntu Linux User and Group Management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Using Generative Artificial Intelligence (AI) in Supply Chains</text:p>
          </table:table-cell>
          <table:table-cell office:value-type="string" calcext:value-type="string">
            <text:p>Supply Chain Software Supply Chain Management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e5d973166cc5c9818b5eaac3952f3148b6252d9473ed033b0241b9864a50e29</text:p>
          </table:table-cell>
          <table:table-cell office:value-type="string" calcext:value-type="string">
            <text:p>CertificateOfCompletion_Using Generative Artificial Intelligence AI in Supply Chai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Welcome to the "Building AI Products: Prototyping Essentials" Professional Certificate</text:p>
          </table:table-cell>
          <table:table-cell office:value-type="string" calcext:value-type="string">
            <text:p>Prototyping AI Software Development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357a22f083c9f9413caad22dab92cc7f9744751c149e02f03f97a101038dfb3</text:p>
          </table:table-cell>
          <table:table-cell office:value-type="string" calcext:value-type="string">
            <text:p>CertificateOfCompletion_Welcome to the Building AI Products Prototyping Essentials Professional Certificat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What Is Generative AI?</text:p>
          </table:table-cell>
          <table:table-cell office:value-type="string" calcext:value-type="string">
            <text:p>Generative AI Tools Artificial Intelligence (AI) Generative AI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0b4e1a412d3fcbd8a1e83fa6eafa650ffa095aedcb4b60cde0597cc5a78e2e84</text:p>
          </table:table-cell>
          <table:table-cell office:value-type="string" calcext:value-type="string">
            <text:p>CertificateOfCompletion_What Is Generative AI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What Is Generative AI?</text:p>
          </table:table-cell>
          <table:table-cell office:value-type="string" calcext:value-type="string">
            <text:p>Generative AI Tools Artificial Intelligence (AI) Generative AI</text:p>
          </table:table-cell>
          <table:table-cell office:value-type="string" calcext:value-type="string">
            <text:p>LinkedIn Learning NASBA</text:p>
          </table:table-cell>
          <table:table-cell table:style-name="ce1" office:value-type="string" calcext:value-type="string">
            <text:p>55ae9543d750ec4f34f116be0f770ba9fa9db14f6970a1d5f17556d095c97b68</text:p>
          </table:table-cell>
          <table:table-cell office:value-type="string" calcext:value-type="string">
            <text:p>CertificateOfCompletion_What Is Generative AI.pdf</text:p>
          </table:table-cell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Sheet1.A1:Sheet1.E9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 loext:blank-width-char="-1">-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12:32:39.85728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6-16T09:14:02</meta:creation-date>
    <dc:date>2026-06-16T12:51:04.709902000</dc:date>
    <meta:generator>LibreOffice/26.2.3.2$MacOSX_AARCH64 LibreOffice_project/70e089b17412e4cb7773e41413306b17a2328c34</meta:generator>
    <meta:editing-duration>PT20M41S</meta:editing-duration>
    <meta:editing-cycles>3</meta:editing-cycles>
    <meta:document-statistic meta:table-count="1" meta:cell-count="475" meta:object-count="0"/>
    <meta:user-defined meta:name="AppVersion">3.1</meta:user-defined>
  </office:meta>
</office:document-meta>
</file>