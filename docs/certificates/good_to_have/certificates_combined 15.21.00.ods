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22in"/>
    </style:style>
    <style:style style:name="co2" style:family="table-column">
      <style:table-column-properties fo:break-before="auto" style:column-width="2.3083in"/>
    </style:style>
    <style:style style:name="co3" style:family="table-column">
      <style:table-column-properties fo:break-before="auto" style:column-width="2.4563in"/>
    </style:style>
    <style:style style:name="co4" style:family="table-column">
      <style:table-column-properties fo:break-before="auto" style:column-width="5.611in"/>
    </style:style>
    <style:style style:name="co5" style:family="table-column">
      <style:table-column-properties fo:break-before="auto" style:column-width="4.8055in"/>
    </style:style>
    <style:style style:name="co6" style:family="table-column">
      <style:table-column-properties fo:break-before="auto" style:column-width="0.686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course_name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skills_id</text:p>
          </table:table-cell>
          <table:table-cell office:value-type="string" calcext:value-type="string">
            <text:p>source_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Negotiation Foundations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LinkedIn Learning / PMI</text:p>
          </table:table-cell>
          <table:table-cell office:value-type="string" calcext:value-type="string">
            <text:p>eef1eb3b812ad6529469d1fdff72f6029d2b4c02b9762a61076cc76e6ee16564</text:p>
          </table:table-cell>
          <table:table-cell office:value-type="string" calcext:value-type="string">
            <text:p>CertificateOfCompletion_Negotiation Foundatio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ublic Speaking Foundations</text:p>
          </table:table-cell>
          <table:table-cell office:value-type="string" calcext:value-type="string">
            <text:p>Public Speaking</text:p>
          </table:table-cell>
          <table:table-cell office:value-type="string" calcext:value-type="string">
            <text:p>LinkedIn Learning / NASBA</text:p>
          </table:table-cell>
          <table:table-cell office:value-type="string" calcext:value-type="string">
            <text:p>13e594f49630d5cbbead1eff51dcc1ffcda884900f29d4de8db23cae09a14544</text:p>
          </table:table-cell>
          <table:table-cell office:value-type="string" calcext:value-type="string">
            <text:p>CertificateOfCompletion_Public Speaking Foundations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ody Language for Leaders and Managers</text:p>
          </table:table-cell>
          <table:table-cell office:value-type="string" calcext:value-type="string">
            <text:p>Body Language Leadership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c021f59f90db546c459717d2417f64474192adc167af84bca180620cf3ffe2cd</text:p>
          </table:table-cell>
          <table:table-cell office:value-type="string" calcext:value-type="string">
            <text:p>CertificateOfCompletion_Body Language for Leaders and Manager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Automation and Testing</text:p>
          </table:table-cell>
          <table:table-cell office:value-type="string" calcext:value-type="string">
            <text:p>Test Automation Python (Programming Language)</text:p>
          </table:table-cell>
          <table:table-cell office:value-type="string" calcext:value-type="string">
            <text:p>LinkedIn Learning / NASBA</text:p>
          </table:table-cell>
          <table:table-cell office:value-type="string" calcext:value-type="string">
            <text:p>2bd6cbe9de9c36354d216bf1175d16ed853db04d63d301745b5905f439c7b0c0</text:p>
          </table:table-cell>
          <table:table-cell office:value-type="string" calcext:value-type="string">
            <text:p>CertificateOfCompletion_Python Automation and Testing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ublic Speaking Foundations</text:p>
          </table:table-cell>
          <table:table-cell office:value-type="string" calcext:value-type="string">
            <text:p>Public Speaking</text:p>
          </table:table-cell>
          <table:table-cell office:value-type="string" calcext:value-type="string">
            <text:p>LinkedIn Learning / PMI</text:p>
          </table:table-cell>
          <table:table-cell office:value-type="string" calcext:value-type="string">
            <text:p>e940fb44ae6042ed10fd21d8262a3de46718b84ab73ff9245c66b05c95b3cf54</text:p>
          </table:table-cell>
          <table:table-cell office:value-type="string" calcext:value-type="string">
            <text:p>CertificateOfCompletion_Public Speaking Foundations-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ody Language for Leaders and Managers</text:p>
          </table:table-cell>
          <table:table-cell office:value-type="string" calcext:value-type="string">
            <text:p>Body Language Leadership</text:p>
          </table:table-cell>
          <table:table-cell office:value-type="string" calcext:value-type="string">
            <text:p>LinkedIn Learning / PMI</text:p>
          </table:table-cell>
          <table:table-cell office:value-type="string" calcext:value-type="string">
            <text:p>acc6a1ad90b6ec9fcd0eb1b870659c6a855255b24636c86a0ee0f506ae630435</text:p>
          </table:table-cell>
          <table:table-cell office:value-type="string" calcext:value-type="string">
            <text:p>CertificateOfCompletion_Body Language for Leaders and Managers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Negotiation Foundations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LinkedIn Learning / NASBA</text:p>
          </table:table-cell>
          <table:table-cell office:value-type="string" calcext:value-type="string">
            <text:p>9c0c75cd16796244e778df16e16b2b4efcf1a971c317c88a0a5b00548bc87816</text:p>
          </table:table-cell>
          <table:table-cell office:value-type="string" calcext:value-type="string">
            <text:p>CertificateOfCompletion_Negotiation Foundations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Negotiation Foundations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b01d1d00ac7b5e81cf26bda33a2f75aa7898462f21a2a7bd9637115e22393eb8</text:p>
          </table:table-cell>
          <table:table-cell office:value-type="string" calcext:value-type="string">
            <text:p>CertificateOfCompletion_Negotiation Foundations-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ublic Speaking Foundations</text:p>
          </table:table-cell>
          <table:table-cell office:value-type="string" calcext:value-type="string">
            <text:p>Public Speaking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297d76c1e88987613afe6c6ed72bf549d2ed3f623951a9a92b5b53c6cfced9cc</text:p>
          </table:table-cell>
          <table:table-cell office:value-type="string" calcext:value-type="string">
            <text:p>CertificateOfCompletion_Public Speaking Foundatio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uild Three Real-World Python Applications</text:p>
          </table:table-cell>
          <table:table-cell office:value-type="string" calcext:value-type="string">
            <text:p>Application Development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61331639584d0b335c3bfb254c62cd4697632028e473dce49febaeaf04608b16</text:p>
          </table:table-cell>
          <table:table-cell office:value-type="string" calcext:value-type="string">
            <text:p>CertificateOfCompletion_Build Three RealWorld Python Applicatio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How to Prepare for Your Negotiations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ef4a6597bbbaa7b2ba2ebaca6197646f9cddc043bd02d9a5c8d1a1c698f47330</text:p>
          </table:table-cell>
          <table:table-cell office:value-type="string" calcext:value-type="string">
            <text:p>CertificateOfCompletion_How to Prepare for Your Negotiatio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ogramming Foundations: Design Patterns</text:p>
          </table:table-cell>
          <table:table-cell office:value-type="string" calcext:value-type="string">
            <text:p>Software Design Patterns Programming Foundation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e308055ff7972d411a372198cf96f8c301081e9c9cce93df69fd7ced995aae45</text:p>
          </table:table-cell>
          <table:table-cell office:value-type="string" calcext:value-type="string">
            <text:p>CertificateOfCompletion_Programming Foundations Design Patter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ogramming Foundations: Secure Coding (2018)</text:p>
          </table:table-cell>
          <table:table-cell office:value-type="string" calcext:value-type="string">
            <text:p>Secure Coding Programming Foundation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b1eddbffc2acbe2e5ca6923dabba9db31b286ae59cba5ac0d05fd89d6d89db34</text:p>
          </table:table-cell>
          <table:table-cell office:value-type="string" calcext:value-type="string">
            <text:p>CertificateOfCompletion_Programming Foundations Secure Coding 2018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Data Structures and Algorithms</text:p>
          </table:table-cell>
          <table:table-cell office:value-type="string" calcext:value-type="string">
            <text:p>Data Structures Python (Programming Language) Algorithm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667f936eb098bfcf0921004be08587258818c7e2cadf3ffc5d7048cf561beae7</text:p>
          </table:table-cell>
          <table:table-cell office:value-type="string" calcext:value-type="string">
            <text:p>CertificateOfCompletion_Python Data Structures and Algorithm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Projects</text:p>
          </table:table-cell>
          <table:table-cell office:value-type="string" calcext:value-type="string">
            <text:p>Software Projects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1fdf1e0619bc4a6944ff538be45e8b8b04b7faf336ecedd8609403da0afbde42</text:p>
          </table:table-cell>
          <table:table-cell office:value-type="string" calcext:value-type="string">
            <text:p>CertificateOfCompletion_Python Projects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ogramming Foundations: Data Structures</text:p>
          </table:table-cell>
          <table:table-cell office:value-type="string" calcext:value-type="string">
            <text:p>Data Structures Programming Foundations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52dcfc94b05406599843bfd74cfacd7ec5a6a2d202bbf1512b00e98512c970b2</text:p>
          </table:table-cell>
          <table:table-cell office:value-type="string" calcext:value-type="string">
            <text:p>CertificateOfCompletion_Programming Foundations Data Structure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stablishing Credibility as a Speaker</text:p>
          </table:table-cell>
          <table:table-cell office:value-type="string" calcext:value-type="string">
            <text:p>Public Speaking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c89d31f822e27ac067ee3b9c87b20aff38a25aa0426a04154622ec1b397ff20e</text:p>
          </table:table-cell>
          <table:table-cell office:value-type="string" calcext:value-type="string">
            <text:p>CertificateOfCompletion_Establishing Credibility as a Speaker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GUI Development with Tkinter</text:p>
          </table:table-cell>
          <table:table-cell office:value-type="string" calcext:value-type="string">
            <text:p>Tkinter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7902c1a858c2eb17e052c74ca418e0488d1f0f307995138c0f89e072a4f1267c</text:p>
          </table:table-cell>
          <table:table-cell office:value-type="string" calcext:value-type="string">
            <text:p>CertificateOfCompletion_Python GUI Development with Tkinter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Level Up: Advanced Python</text:p>
          </table:table-cell>
          <table:table-cell office:value-type="string" calcext:value-type="string">
            <text:p>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a72b6a650cfb716c2c11bcf0199e6f48b2c4d7d60d58655232dc554aef6aad54</text:p>
          </table:table-cell>
          <table:table-cell office:value-type="string" calcext:value-type="string">
            <text:p>CertificateOfCompletion_Level Up Advanced Python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actice It: Python Data Structures</text:p>
          </table:table-cell>
          <table:table-cell office:value-type="string" calcext:value-type="string">
            <text:p>Data Structures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05b39243978f9956370bca7b0ccbc9867c202a6bd94b9cb6335be6ca454ddd4b</text:p>
          </table:table-cell>
          <table:table-cell office:value-type="string" calcext:value-type="string">
            <text:p>CertificateOfCompletion_Practice It Python Data Structure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When Negotiation's about More than Money: How to Negotiate (Almost) Anything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c3cc8cb0af5516bf4c830304893a386510a302376c0125d86bdc7353d63fc15a</text:p>
          </table:table-cell>
          <table:table-cell office:value-type="string" calcext:value-type="string">
            <text:p>CertificateOfCompletion_When Negotiations about More than Money How to Negotiate Almost Anything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ore Python Tips, Tricks, and Techniques for Data Science</text:p>
          </table:table-cell>
          <table:table-cell office:value-type="string" calcext:value-type="string">
            <text:p>Python (Programming Language) Data Science</text:p>
          </table:table-cell>
          <table:table-cell office:value-type="string" calcext:value-type="string">
            <text:p>LinkedIn Learning / NASBA</text:p>
          </table:table-cell>
          <table:table-cell office:value-type="string" calcext:value-type="string">
            <text:p>d4338c5059675c50c0cfb0bd019801d293cd36f14aba7470649d6aa97bce5716</text:p>
          </table:table-cell>
          <table:table-cell office:value-type="string" calcext:value-type="string">
            <text:p>CertificateOfCompletion_ More Python Tips Tricks and Techniques for Data Science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Practice: Real-World Coding Challenges</text:p>
          </table:table-cell>
          <table:table-cell office:value-type="string" calcext:value-type="string">
            <text:p>Python (Programming Language) Coding Practice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c738105cd728d7c4363d74c0172474ea35b767069e7f3409ad1b18b11ea4228d</text:p>
          </table:table-cell>
          <table:table-cell office:value-type="string" calcext:value-type="string">
            <text:p>CertificateOfCompletion_Python Practice RealWorld Coding Challenge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Understanding AI’s Global Impact: Governance, Equity, and Responsibility</text:p>
          </table:table-cell>
          <table:table-cell office:value-type="string" calcext:value-type="string">
            <text:p>AI Equity Artificial Intelligence (AI) Responsible AI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cc1c68862fecef6bcef9328a572e35ac545f4c468244188f42e6a6dd19784788</text:p>
          </table:table-cell>
          <table:table-cell office:value-type="string" calcext:value-type="string">
            <text:p>CertificateOfCompletion_Understanding AIs Global Impact Governance Equity and Responsibility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Projects: Create an Interactive Quiz Application</text:p>
          </table:table-cell>
          <table:table-cell office:value-type="string" calcext:value-type="string">
            <text:p>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61dd777f9c0a82159956438af858668e6675b18801422a473d8b9797333258f6</text:p>
          </table:table-cell>
          <table:table-cell office:value-type="string" calcext:value-type="string">
            <text:p>CertificateOfCompletion_Python Projects Create an Interactive Quiz Application 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trategic Negotiation</text:p>
          </table:table-cell>
          <table:table-cell office:value-type="string" calcext:value-type="string">
            <text:p>Strategic Negotiation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7c2550090d6f8aa28da06237ea48eeafff1f80a4474a6653d8b88ccf82307fb9</text:p>
          </table:table-cell>
          <table:table-cell office:value-type="string" calcext:value-type="string">
            <text:p>CertificateOfCompletion_Strategic Negotiation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Impromptu Speaking</text:p>
          </table:table-cell>
          <table:table-cell office:value-type="string" calcext:value-type="string">
            <text:p>Extemporaneous Speaking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a3ab51dd73a32d010cc9fef91dce6d2242cb1f5b322e58457a23701a1af58822</text:p>
          </table:table-cell>
          <table:table-cell office:value-type="string" calcext:value-type="string">
            <text:p>CertificateOfCompletion_Impromptu Speaking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Practice: Operations</text:p>
          </table:table-cell>
          <table:table-cell office:value-type="string" calcext:value-type="string">
            <text:p>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59527bd957ae59af8fcf132daece894c9198c0cc1bc58bd18581b510ffe60a54</text:p>
          </table:table-cell>
          <table:table-cell office:value-type="string" calcext:value-type="string">
            <text:p>CertificateOfCompletion_Python Practice Operatio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ogramming Foundations: Algorithms</text:p>
          </table:table-cell>
          <table:table-cell office:value-type="string" calcext:value-type="string">
            <text:p>Algorithm Design Data Structures Programming Foundation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af1d6b52696f80fbbc024a212f9b934d44f0e607db686a65cd313715e03cde8f</text:p>
          </table:table-cell>
          <table:table-cell office:value-type="string" calcext:value-type="string">
            <text:p>CertificateOfCompletion_Programming Foundations Algorithm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ore Python Tips, Tricks, and Techniques for Data Science</text:p>
          </table:table-cell>
          <table:table-cell office:value-type="string" calcext:value-type="string">
            <text:p>Python (Programming Language) Data Science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610d818d0446da36dcff6ab77a3ae10b896654ccc6440fa671989fdfec7bcc71</text:p>
          </table:table-cell>
          <table:table-cell office:value-type="string" calcext:value-type="string">
            <text:p>CertificateOfCompletion_ More Python Tips Tricks and Techniques for Data Scienc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uilding the Classic Snake Game with Python</text:p>
          </table:table-cell>
          <table:table-cell office:value-type="string" calcext:value-type="string">
            <text:p>Game Programming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71b50379ba48eeb9123118a1dbbfada8bc974a12060dfd4fb253b8c8a45baeb4</text:p>
          </table:table-cell>
          <table:table-cell office:value-type="string" calcext:value-type="string">
            <text:p>CertificateOfCompletion_Building the Classic Snake Game with Pytho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for Data Analysis: Solve Real- World Challenges</text:p>
          </table:table-cell>
          <table:table-cell office:value-type="string" calcext:value-type="string">
            <text:p>Data Analysis Big Data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dbae17043095bdcfdb4f2652c0c608447a56a1a95d56ac121c2cafc3b964130f</text:p>
          </table:table-cell>
          <table:table-cell office:value-type="string" calcext:value-type="string">
            <text:p>CertificateOfCompletion_Python for Data Analysis Solve RealWorld Challenge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ogramming Foundations: Software Testing/QA</text:p>
          </table:table-cell>
          <table:table-cell office:value-type="string" calcext:value-type="string">
            <text:p>Software Testing Programming Foundations Software Quality Assurance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9d137b2c3745e79ed7bc9c7358ee4bce1b9bf4d5c5716976ea457a69e31e30d6</text:p>
          </table:table-cell>
          <table:table-cell office:value-type="string" calcext:value-type="string">
            <text:p>CertificateOfCompletion_Programming Foundations Software TestingQA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Automation and Testing</text:p>
          </table:table-cell>
          <table:table-cell office:value-type="string" calcext:value-type="string">
            <text:p>Test Automation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a8f897f21fa3d27f4fd01c8a90f07f092c0ba0bd59cc5522b6a508e11d955ebe</text:p>
          </table:table-cell>
          <table:table-cell office:value-type="string" calcext:value-type="string">
            <text:p>CertificateOfCompletion_Python Automation and Testing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ase Study: Visualize Complex Microservice Data Using Python</text:p>
          </table:table-cell>
          <table:table-cell office:value-type="string" calcext:value-type="string">
            <text:p>Microservices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016d43e459724b6ded75735c5c5a614bcf8980846f5ff25e3d330ccf4d47bf57</text:p>
          </table:table-cell>
          <table:table-cell office:value-type="string" calcext:value-type="string">
            <text:p>CertificateOfCompletion_Case Study Visualize Complex Microservice Data Using Pytho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Negotiating with Agility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78e05c6806f36fbdbc46d90842b62f98319b7b0dfc00baacd1173015b125a5c8</text:p>
          </table:table-cell>
          <table:table-cell office:value-type="string" calcext:value-type="string">
            <text:p>CertificateOfCompletion_Negotiating with Agility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Projects</text:p>
          </table:table-cell>
          <table:table-cell office:value-type="string" calcext:value-type="string">
            <text:p>Software Projects Python (Programming Language)</text:p>
          </table:table-cell>
          <table:table-cell office:value-type="string" calcext:value-type="string">
            <text:p>LinkedIn Learning / PMI</text:p>
          </table:table-cell>
          <table:table-cell office:value-type="string" calcext:value-type="string">
            <text:p>0e9b1745ab88eb25409bd0f6db1655e683fa44a460733fa39812837cc938620c</text:p>
          </table:table-cell>
          <table:table-cell office:value-type="string" calcext:value-type="string">
            <text:p>CertificateOfCompletion_Python Project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ogramming Foundations: Databases</text:p>
          </table:table-cell>
          <table:table-cell office:value-type="string" calcext:value-type="string">
            <text:p>Database Development Databases Programming Foundation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c7000045b516916159cba767739e3453effb366939ab667518265ede9d5d4506</text:p>
          </table:table-cell>
          <table:table-cell office:value-type="string" calcext:value-type="string">
            <text:p>CertificateOfCompletion_Programming Foundations Database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Writing and Delivering Speeches</text:p>
          </table:table-cell>
          <table:table-cell office:value-type="string" calcext:value-type="string">
            <text:p>Speech Writing Public Speaking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81ee455bce4d8389a6134a3e00f555c2775199965e0e015aecdfe3e3fa797890</text:p>
          </table:table-cell>
          <table:table-cell office:value-type="string" calcext:value-type="string">
            <text:p>CertificateOfCompletion_Writing and Delivering Speeche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ogramming Foundations: APIs and Web Services</text:p>
          </table:table-cell>
          <table:table-cell office:value-type="string" calcext:value-type="string">
            <text:p>REST APIs Programming Foundations GraphQL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a48423b099091188de4dbe30ca73bce81c143a167a4df9fd0d4f68b6bb672781</text:p>
          </table:table-cell>
          <table:table-cell office:value-type="string" calcext:value-type="string">
            <text:p>CertificateOfCompletion_Programming Foundations APIs and Web Service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ogramming Foundations: Test- Driven Development</text:p>
          </table:table-cell>
          <table:table-cell office:value-type="string" calcext:value-type="string">
            <text:p>Test-Driven Development Programming Foundation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867eca1bbe9e8a4430a5004bb3a7f07d38e3b10064b59782f66d7ebc3d9abb64</text:p>
          </table:table-cell>
          <table:table-cell office:value-type="string" calcext:value-type="string">
            <text:p>CertificateOfCompletion_Programming Foundations TestDriven Development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reate an Open-Source Project in Python</text:p>
          </table:table-cell>
          <table:table-cell office:value-type="string" calcext:value-type="string">
            <text:p>Open-Source Development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ee3067170d51b04089c1ba485c1cc188959d65e5fd8c9a11f8df304d38c334af</text:p>
          </table:table-cell>
          <table:table-cell office:value-type="string" calcext:value-type="string">
            <text:p>CertificateOfCompletion_Create an OpenSource Project in Pytho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Impromptu Speaking</text:p>
          </table:table-cell>
          <table:table-cell office:value-type="string" calcext:value-type="string">
            <text:p>Extemporaneous Speaking</text:p>
          </table:table-cell>
          <table:table-cell office:value-type="string" calcext:value-type="string">
            <text:p>LinkedIn Learning / NASBA</text:p>
          </table:table-cell>
          <table:table-cell office:value-type="string" calcext:value-type="string">
            <text:p>31c2ad697c19a61af92a50523dbf742c347d20578e94ffd2d89bc9793244de0b</text:p>
          </table:table-cell>
          <table:table-cell office:value-type="string" calcext:value-type="string">
            <text:p>CertificateOfCompletion_Impromptu Speaking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trategic Negotiation</text:p>
          </table:table-cell>
          <table:table-cell office:value-type="string" calcext:value-type="string">
            <text:p>Strategic Negotiations</text:p>
          </table:table-cell>
          <table:table-cell office:value-type="string" calcext:value-type="string">
            <text:p>LinkedIn Learning / NASBA</text:p>
          </table:table-cell>
          <table:table-cell office:value-type="string" calcext:value-type="string">
            <text:p>77e7e33036e09baa489adda9405d84306d4aba2d93cb8253cb4ac3102d6eb536</text:p>
          </table:table-cell>
          <table:table-cell office:value-type="string" calcext:value-type="string">
            <text:p>CertificateOfCompletion_Strategic Negotiatio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How to Be Both Assertive and Likable</text:p>
          </table:table-cell>
          <table:table-cell office:value-type="string" calcext:value-type="string">
            <text:p>Interpersonal Skill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9f2a6d59380f7ce0e31312d4e487073f7302b874606579cc427c066eeb042d82</text:p>
          </table:table-cell>
          <table:table-cell office:value-type="string" calcext:value-type="string">
            <text:p>CertificateOfCompletion_How to Be Both Assertive and Likabl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ogramming Foundations: Memory, Pointers, and Garbage Collection</text:p>
          </table:table-cell>
          <table:table-cell office:value-type="string" calcext:value-type="string">
            <text:p>Programming Memory Management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e1d8a986d5fa537772d298730420544e982c30707b1262cc54d97cebf803fb03</text:p>
          </table:table-cell>
          <table:table-cell office:value-type="string" calcext:value-type="string">
            <text:p>CertificateOfCompletion_Programming Foundations Memory Pointers and Garbage Collectio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Level Up: Advanced Python</text:p>
          </table:table-cell>
          <table:table-cell office:value-type="string" calcext:value-type="string">
            <text:p>Python (Programming Language)</text:p>
          </table:table-cell>
          <table:table-cell office:value-type="string" calcext:value-type="string">
            <text:p>LinkedIn Learning / NASBA</text:p>
          </table:table-cell>
          <table:table-cell office:value-type="string" calcext:value-type="string">
            <text:p>45c7978203cc9dd56e36c96408dd4d06ea4ce4659b7117f8c1f7e0a6504faaa1</text:p>
          </table:table-cell>
          <table:table-cell office:value-type="string" calcext:value-type="string">
            <text:p>CertificateOfCompletion_Level Up Advanced Pytho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Practice: Object-Oriented Programming</text:p>
          </table:table-cell>
          <table:table-cell office:value-type="string" calcext:value-type="string">
            <text:p>Python (Programming Language) Object-Oriented Programming (OOP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ab7d3665e0e14f27a611a60ef73077be4d6829ec4e6b09d64e2d289e70808ff6</text:p>
          </table:table-cell>
          <table:table-cell office:value-type="string" calcext:value-type="string">
            <text:p>CertificateOfCompletion_Python Practice ObjectOriented Programming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esenting Technical Information with Stories</text:p>
          </table:table-cell>
          <table:table-cell office:value-type="string" calcext:value-type="string">
            <text:p>Technical Presentation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d9363c22267d00c2c57bb038a3734491462c4998e4a02ff9967e44288a9bcbd9</text:p>
          </table:table-cell>
          <table:table-cell office:value-type="string" calcext:value-type="string">
            <text:p>CertificateOfCompletion_Presenting Technical Information with Storie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stablishing Credibility as a Speaker</text:p>
          </table:table-cell>
          <table:table-cell office:value-type="string" calcext:value-type="string">
            <text:p>Public Speaking</text:p>
          </table:table-cell>
          <table:table-cell office:value-type="string" calcext:value-type="string">
            <text:p>LinkedIn Learning / PMI</text:p>
          </table:table-cell>
          <table:table-cell office:value-type="string" calcext:value-type="string">
            <text:p>27fe63801a8fe503994542fcff13c7297f28ae0f94b5e6c1065310078d3839f2</text:p>
          </table:table-cell>
          <table:table-cell office:value-type="string" calcext:value-type="string">
            <text:p>CertificateOfCompletion_Establishing Credibility as a Speaker-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Responsible AI: Global Risks, Governance, and Human Oversight</text:p>
          </table:table-cell>
          <table:table-cell office:value-type="string" calcext:value-type="string">
            <text:p>Governance, Risk Management, and Compliance (GRC) Artificial Intelligence (AI) Responsible AI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32aefc266a445cfc2fe64435a4994c01ae169bab41ec2b9ff4685337fb1daddb</text:p>
          </table:table-cell>
          <table:table-cell office:value-type="string" calcext:value-type="string">
            <text:p>CertificateOfCompletion_Responsible AI Global Risks Governance and Human Oversight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AI in Action: Global Case Studies from Public Institutions</text:p>
          </table:table-cell>
          <table:table-cell office:value-type="string" calcext:value-type="string">
            <text:p>AI Policy, Governance, and Regulation Governance, Risk Management, and Compliance (GRC),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78f8bc2e179bd7646ae240800ac2214c9a993a9b9ab3b35d2c93051f5bfb67c2</text:p>
          </table:table-cell>
          <table:table-cell office:value-type="string" calcext:value-type="string">
            <text:p>CertificateOfCompletion_AI in Action Global Case Studies from Public Institutio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stablishing Credibility as a Speaker</text:p>
          </table:table-cell>
          <table:table-cell office:value-type="string" calcext:value-type="string">
            <text:p>Public Speaking</text:p>
          </table:table-cell>
          <table:table-cell office:value-type="string" calcext:value-type="string">
            <text:p>LinkedIn Learning / NASBA</text:p>
          </table:table-cell>
          <table:table-cell office:value-type="string" calcext:value-type="string">
            <text:p>1f9a576e6e8f3351dc349d999b066e720a8ab29e812e10ac1eca99f4c45a0015</text:p>
          </table:table-cell>
          <table:table-cell office:value-type="string" calcext:value-type="string">
            <text:p>CertificateOfCompletion_Establishing Credibility as a Speaker-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Practice: Collections</text:p>
          </table:table-cell>
          <table:table-cell office:value-type="string" calcext:value-type="string">
            <text:p>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38bf673bc4df59bc437cb9043dc3bb8727856e9cb791679fdda7ad084effaad1</text:p>
          </table:table-cell>
          <table:table-cell office:value-type="string" calcext:value-type="string">
            <text:p>CertificateOfCompletion_Python Practice Collections.pdf</text:p>
          </table:table-cell>
          <table:table-cell table:style-name="Default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6-17T13:08:10</meta:creation-date>
    <dc:date>2026-06-17T15:24:37.328204000</dc:date>
    <meta:generator>LibreOffice/26.2.3.2$MacOSX_AARCH64 LibreOffice_project/70e089b17412e4cb7773e41413306b17a2328c34</meta:generator>
    <meta:editing-duration>PT1M21S</meta:editing-duration>
    <meta:editing-cycles>1</meta:editing-cycles>
    <meta:document-statistic meta:table-count="1" meta:cell-count="275" meta:object-count="0"/>
    <meta:user-defined meta:name="AppVersion">3.1</meta:user-defined>
  </office:meta>
</office:document-meta>
</file>