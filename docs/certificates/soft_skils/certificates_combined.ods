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11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4.161in"/>
    </style:style>
    <style:style style:name="co5" style:family="table-column">
      <style:table-column-properties fo:break-before="auto" style:column-width="2.4161in"/>
    </style:style>
    <style:style style:name="co6" style:family="table-column">
      <style:table-column-properties fo:break-before="auto" style:column-width="0.686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course_na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kills_id</text:p>
          </table:table-cell>
          <table:table-cell office:value-type="string" calcext:value-type="string">
            <text:p>source_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Support Colleagues from Underrepresented Groups</text:p>
          </table:table-cell>
          <table:table-cell office:value-type="string" calcext:value-type="string">
            <text:p>Workplace Relations Allyship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3c3cda7054517cd039fbd09f0c605c945228e5e83a97a88b0816c988829af59</text:p>
          </table:table-cell>
          <table:table-cell office:value-type="string" calcext:value-type="string">
            <text:p>CertificateOfCompletion_How to Support Colleagues from Underrepresented Group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quity First: The Path to Inclusion and Belonging</text:p>
          </table:table-cell>
          <table:table-cell office:value-type="string" calcext:value-type="string">
            <text:p>Social Equity 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41fe1ae8b0e9c0f5ba469ebbea08f9f4e8397a5de354f18d0d8ea167f800f95</text:p>
          </table:table-cell>
          <table:table-cell office:value-type="string" calcext:value-type="string">
            <text:p>CertificateOfCompletion_Equity First The Path to Inclusion and Belonging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ritical Thinking for Better Judgment and Decision-Making</text:p>
          </table:table-cell>
          <table:table-cell office:value-type="string" calcext:value-type="string">
            <text:p>Critical Thinking Decision-M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50868ea1d581106d391e7a01817f4a7289fead0ca18134717ae3844080151f2</text:p>
          </table:table-cell>
          <table:table-cell office:value-type="string" calcext:value-type="string">
            <text:p>CertificateOfCompletion_Critical Thinking for Better Judgment and DecisionMaking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rammarly: Your AI Writing Partner</text:p>
          </table:table-cell>
          <table:table-cell office:value-type="string" calcext:value-type="string">
            <text:p>AI Productivity Artificial Intelligence (AI) Grammarly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7f80df03881d044d51748b33c2620d0e99e4c826dea2a26f85ed42fd6d6e171</text:p>
          </table:table-cell>
          <table:table-cell office:value-type="string" calcext:value-type="string">
            <text:p>CertificateOfCompletion_Grammarly Your AI Writing Partner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eveloping a Feedback Mindset to Accelerate Your Career</text:p>
          </table:table-cell>
          <table:table-cell office:value-type="string" calcext:value-type="string">
            <text:p>Career Development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89d18dbdc755b631486268b07d888ec5f8fa291d2a97d4cadfec6e65183a7f1</text:p>
          </table:table-cell>
          <table:table-cell office:value-type="string" calcext:value-type="string">
            <text:p>CertificateOfCompletion_Developing a Feedback Mindset to Accelerate Your Career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mmunicating with Confidence</text:p>
          </table:table-cell>
          <table:table-cell office:value-type="string" calcext:value-type="string">
            <text:p>Communication Confidence Building Self-confidenc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9f3bf999e4b522a0fff5ce03c8844d9ba6e10f5e14cb49c99f6be06ca9ff630</text:p>
          </table:table-cell>
          <table:table-cell office:value-type="string" calcext:value-type="string">
            <text:p>CertificateOfCompletion_Communicating with Confid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he New AI Tech Stack: AI Literacy for Tech Leaders</text:p>
          </table:table-cell>
          <table:table-cell office:value-type="string" calcext:value-type="string">
            <text:p>Digital Literacy AI Literacy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e292d72a007de0fc40252e91af0453ec132197a89b463dc69d5ff673065d7a5</text:p>
          </table:table-cell>
          <table:table-cell office:value-type="string" calcext:value-type="string">
            <text:p>CertificateOfCompletion_The New AI Tech Stack AI Literacy for Tech Leader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fluencing Others (2019)</text:p>
          </table:table-cell>
          <table:table-cell office:value-type="string" calcext:value-type="string">
            <text:p>Influencing Other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f97a8464fa9c27cb2abe9737dda1a31737e6a8b6fcceeaa25e6bb86e3f82975</text:p>
          </table:table-cell>
          <table:table-cell office:value-type="string" calcext:value-type="string">
            <text:p>CertificateOfCompletion_Influencing Others 2019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fluencing Others</text:p>
          </table:table-cell>
          <table:table-cell office:value-type="string" calcext:value-type="string">
            <text:p>Influencing Others Social Influenc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1b5f5f1437acd02c891c1177b993bf8f95f84792cb5249025dba3ccb572dc60</text:p>
          </table:table-cell>
          <table:table-cell office:value-type="string" calcext:value-type="string">
            <text:p>CertificateOfCompletion_Influencing Other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Emails People Want to Read</text:p>
          </table:table-cell>
          <table:table-cell office:value-type="string" calcext:value-type="string">
            <text:p>Email Written Communic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333d890702f4376d20c40b8571ac51bba50c27fb7588282eed54ec240e40763</text:p>
          </table:table-cell>
          <table:table-cell office:value-type="string" calcext:value-type="string">
            <text:p>CertificateOfCompletion_Writing Emails People Want to Read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rammar Foundations</text:p>
          </table:table-cell>
          <table:table-cell office:value-type="string" calcext:value-type="string">
            <text:p>Written Communication Grammar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491bd140c124297efcd3cde8712bf23eaea7733694a2368a4673a717356f77f</text:p>
          </table:table-cell>
          <table:table-cell office:value-type="string" calcext:value-type="string">
            <text:p>CertificateOfCompletion_Grammar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ultural Humility and Agility</text:p>
          </table:table-cell>
          <table:table-cell office:value-type="string" calcext:value-type="string">
            <text:p>Cultural Awareness 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de5434e4ee7e865c4ff65656b2b47dc0631c748e20410dd37fe9bcd912f254e</text:p>
          </table:table-cell>
          <table:table-cell office:value-type="string" calcext:value-type="string">
            <text:p>CertificateOfCompletion_Cultural Humility and Agil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Email</text:p>
          </table:table-cell>
          <table:table-cell office:value-type="string" calcext:value-type="string">
            <text:p>Email Etiquette Professional Communic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07f66727d60297e2160d18741c6d4307ea08cf231d5d4f6d442316d0d8eea51</text:p>
          </table:table-cell>
          <table:table-cell office:value-type="string" calcext:value-type="string">
            <text:p>CertificateOfCompletion_Writing Email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ing Positive at Work</text:p>
          </table:table-cell>
          <table:table-cell office:value-type="string" calcext:value-type="string">
            <text:p>Positive Psychology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d16ab9887a24fa34e5987afc21cc960feade8ec03f54862f70cbd8e0458525b</text:p>
          </table:table-cell>
          <table:table-cell office:value-type="string" calcext:value-type="string">
            <text:p>CertificateOfCompletion_Being Positive at Work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esigning a Presentation</text:p>
          </table:table-cell>
          <table:table-cell office:value-type="string" calcext:value-type="string">
            <text:p>Presentation Desig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d31b2c7a0192953f36a0383cbc3a6566904b23a22fa86b8bb93afcd4e4b1c1c</text:p>
          </table:table-cell>
          <table:table-cell office:value-type="string" calcext:value-type="string">
            <text:p>CertificateOfCompletion_Designing a Presentati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Create Executive-Level Data Visualizations</text:p>
          </table:table-cell>
          <table:table-cell office:value-type="string" calcext:value-type="string">
            <text:p>Data Visualization Executive Presentation Skill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ebccd3afb42944d9342c1800a50725e8ebd161e772a5125d42cee8d728b2609</text:p>
          </table:table-cell>
          <table:table-cell office:value-type="string" calcext:value-type="string">
            <text:p>CertificateOfCompletion_How to Create ExecutiveLevel Data Visualiz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mmunicating about Culturally Sensitive Issues</text:p>
          </table:table-cell>
          <table:table-cell office:value-type="string" calcext:value-type="string">
            <text:p>Sensitive Issues Cross-Cultural Communic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3cefc48ac8f679147fdecf4ba8d17ffe54257004f726f604e7866dd706ad9e4</text:p>
          </table:table-cell>
          <table:table-cell office:value-type="string" calcext:value-type="string">
            <text:p>CertificateOfCompletion_Communicating about Culturally Sensitive Issue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locking Authentic Communication in a Culturally-Diverse Workplace</text:p>
          </table:table-cell>
          <table:table-cell office:value-type="string" calcext:value-type="string">
            <text:p>Professional Communication Cross-Cultural Communic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7eb1febb052666265233bace10f799adf2333b577ef6c7d5cf94fdd312c1266</text:p>
          </table:table-cell>
          <table:table-cell office:value-type="string" calcext:value-type="string">
            <text:p>CertificateOfCompletion_Unlocking Authentic Communication in a CulturallyDiverse Workpla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aving Difficult Conversations</text:p>
          </table:table-cell>
          <table:table-cell office:value-type="string" calcext:value-type="string">
            <text:p>Interpersonal Communication Difficult Situ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cc69490f51e1c9bd0a732a11faa1f22b34e2f7a254307033ac75bb5474192ce</text:p>
          </table:table-cell>
          <table:table-cell office:value-type="string" calcext:value-type="string">
            <text:p>CertificateOfCompletion_Having Difficult Conversation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ading Your Org on a Journey of Allyship</text:p>
          </table:table-cell>
          <table:table-cell office:value-type="string" calcext:value-type="string">
            <text:p>Allyship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f80ff94b38e6edd63f6ddd019bb80379d00f04891ec946b01fc0b85f07871c4</text:p>
          </table:table-cell>
          <table:table-cell office:value-type="string" calcext:value-type="string">
            <text:p>CertificateOfCompletion_Leading Your Org on a Journey of Allyship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clusive Mindset</text:p>
          </table:table-cell>
          <table:table-cell office:value-type="string" calcext:value-type="string">
            <text:p>Inclusive Team Leadership 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4407c97035ac4282d24387b5e21f6f8ae5508724d23f73186d0be3b1ade96fe</text:p>
          </table:table-cell>
          <table:table-cell office:value-type="string" calcext:value-type="string">
            <text:p>CertificateOfCompletion_Inclusive Mindset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oundations of Diversity, Equity, Inclusion, and Belonging</text:p>
          </table:table-cell>
          <table:table-cell office:value-type="string" calcext:value-type="string">
            <text:p>Diversity, Equity, Inclusion and Belonging (DEIB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51654bbdd10d6efcbb821e32d2317ae25cc07e362e20e1469116df0bcba343f</text:p>
          </table:table-cell>
          <table:table-cell office:value-type="string" calcext:value-type="string">
            <text:p>CertificateOfCompletion_Foundations of Diversity Equity Inclusion and Belong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conscious Bias</text:p>
          </table:table-cell>
          <table:table-cell office:value-type="string" calcext:value-type="string">
            <text:p>Unconscious Bias Awareness Training 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ce065bbca7055f625821499032ebbf4e36bc30a61d736d939e6b8f8032b45ca</text:p>
          </table:table-cell>
          <table:table-cell office:value-type="string" calcext:value-type="string">
            <text:p>CertificateOfCompletion_Unconscious Bia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kills for Inclusive Conversations</text:p>
          </table:table-cell>
          <table:table-cell office:value-type="string" calcext:value-type="string">
            <text:p>Interpersonal Communication 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59e937b7a8a1786628a3cd00a5dcbda12eb9e30cd39983824ea2de5e5bef361</text:p>
          </table:table-cell>
          <table:table-cell office:value-type="string" calcext:value-type="string">
            <text:p>CertificateOfCompletion_Skills for Inclusive Convers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Formal Business Letters and Emails</text:p>
          </table:table-cell>
          <table:table-cell office:value-type="string" calcext:value-type="string">
            <text:p>Business Communic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2501daaf460c7af85ef7f4ab054d967c870942fdc78d055b05975bb585c7635</text:p>
          </table:table-cell>
          <table:table-cell office:value-type="string" calcext:value-type="string">
            <text:p>CertificateOfCompletion_Writing Formal Business Letters and Email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siness Writing Principles</text:p>
          </table:table-cell>
          <table:table-cell office:value-type="string" calcext:value-type="string">
            <text:p>Business Writ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9aa4ddb9a78d12526e16a174c53d31bac761a25c1bd00bff1fa49f699b75574</text:p>
          </table:table-cell>
          <table:table-cell office:value-type="string" calcext:value-type="string">
            <text:p>CertificateOfCompletion_Business Writing Principle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gital Body Language</text:p>
          </table:table-cell>
          <table:table-cell office:value-type="string" calcext:value-type="string">
            <text:p>Body Language Professional Communic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0819f316bbe52fa801fc09f7a5f00eed1eecb47966e604783c9d668a9e28e6b</text:p>
          </table:table-cell>
          <table:table-cell office:value-type="string" calcext:value-type="string">
            <text:p>CertificateOfCompletion_Digital Body Languag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ecision-Making Strategies</text:p>
          </table:table-cell>
          <table:table-cell office:value-type="string" calcext:value-type="string">
            <text:p>Decision-M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73150bd21dd5401b5e6ccaf4fde59c1566cbbc871f7ae1ebeae1be8ea863a87</text:p>
          </table:table-cell>
          <table:table-cell office:value-type="string" calcext:value-type="string">
            <text:p>CertificateOfCompletion_DecisionMaking Strategie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versity, Inclusion, and Belonging</text:p>
          </table:table-cell>
          <table:table-cell office:value-type="string" calcext:value-type="string">
            <text:p>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3f0d83e2db20f5549e52caa768ae2f06a3b8a560860f207986cf9fc1775668b</text:p>
          </table:table-cell>
          <table:table-cell office:value-type="string" calcext:value-type="string">
            <text:p>CertificateOfCompletion_Diversity Inclusion and Belonging-3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 an Inclusive Organization People Won't Leave</text:p>
          </table:table-cell>
          <table:table-cell office:value-type="string" calcext:value-type="string">
            <text:p>Organizational Culture 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18ae65196cdee382de1dfee70e969d9aad12dc66626438d8d603bddceb8290c</text:p>
          </table:table-cell>
          <table:table-cell office:value-type="string" calcext:value-type="string">
            <text:p>CertificateOfCompletion_Be an Inclusive Organization People Wont Leave-3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istory of Responsible AI: From Principles to Professionalization by All Tech Is Human</text:p>
          </table:table-cell>
          <table:table-cell office:value-type="string" calcext:value-type="string">
            <text:p>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db8caf41bdff282ac5fe590ea3e7cadf3c326cffe4cc9501bdb5a242bc751e2</text:p>
          </table:table-cell>
          <table:table-cell office:value-type="string" calcext:value-type="string">
            <text:p>CertificateOfCompletion_History of Responsible AI From Principles to Professionalization by All Tech Is Huma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Find the Work You Love</text:p>
          </table:table-cell>
          <table:table-cell office:value-type="string" calcext:value-type="string">
            <text:p>Job Search Strategies Career Path Plann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dd52ab0b155fea4bd0e4096f3065f4506f3094d11bbb13bbc6c98489861e7a8</text:p>
          </table:table-cell>
          <table:table-cell office:value-type="string" calcext:value-type="string">
            <text:p>CertificateOfCompletion_How to Find the Work You Lov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Find the Work You Love</text:p>
          </table:table-cell>
          <table:table-cell office:value-type="string" calcext:value-type="string">
            <text:p>Job Search Strategies Career Path Plann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dd52ab0b155fea4bd0e4096f3065f4506f3094d11bbb13bbc6c98489861e7a8</text:p>
          </table:table-cell>
          <table:table-cell office:value-type="string" calcext:value-type="string">
            <text:p>CertificateOfCompletion_How to Find the Work You Lov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nflict Resolution Foundations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03f9e4ba8b48c90819874eba9f81a01567e7e9f46c4e0b2035b8cb946a8ec17</text:p>
          </table:table-cell>
          <table:table-cell office:value-type="string" calcext:value-type="string">
            <text:p>CertificateOfCompletion_Conflict Resolution Found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mmunicating with Emotional Intelligence</text:p>
          </table:table-cell>
          <table:table-cell office:value-type="string" calcext:value-type="string">
            <text:p>Emotional Intelligence Interpersonal Communic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2d2b7f28abad172434f906e7df4093dd8622a5e32817d184fb64e1cee976d22</text:p>
          </table:table-cell>
          <table:table-cell office:value-type="string" calcext:value-type="string">
            <text:p>CertificateOfCompletion_Communicating with Emotional Intellig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hat's the So What: Writing Clearly for a Business Audience</text:p>
          </table:table-cell>
          <table:table-cell office:value-type="string" calcext:value-type="string">
            <text:p>Business Writ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c7671d69cabb96fc82d33d414ac6b6409766068712fb592da6d84686f57ceeb</text:p>
          </table:table-cell>
          <table:table-cell office:value-type="string" calcext:value-type="string">
            <text:p>CertificateOfCompletion_Whats the So What Writing Clearly for a Business Audi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ffective Listening</text:p>
          </table:table-cell>
          <table:table-cell office:value-type="string" calcext:value-type="string">
            <text:p>Communication Active Listen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29dae6cd3a77016205d8156d6db9bda024c16cc1539d7b157946d9ee764b6e7</text:p>
          </table:table-cell>
          <table:table-cell office:value-type="string" calcext:value-type="string">
            <text:p>CertificateOfCompletion_Effective Listen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Career Skills in Software Development</text:p>
          </table:table-cell>
          <table:table-cell office:value-type="string" calcext:value-type="string">
            <text:p>Software Development Career Management Tech Career Skill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91032002bfdce572d0faaa420c87cd1677a749c7356a057c442f5ca41c0f245</text:p>
          </table:table-cell>
          <table:table-cell office:value-type="string" calcext:value-type="string">
            <text:p>CertificateOfCompletion_Introduction to Career Skills in Software Developmen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naging Stress for Positive Change (2022)</text:p>
          </table:table-cell>
          <table:table-cell office:value-type="string" calcext:value-type="string">
            <text:p>Stress Management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cff1bc405a9987799054f034f5fbff1b20f45e39b0d0512922672f09f71ac06</text:p>
          </table:table-cell>
          <table:table-cell office:value-type="string" calcext:value-type="string">
            <text:p>CertificateOfCompletion_Managing Stress for Positive Change 2022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fluencing Others (2019)</text:p>
          </table:table-cell>
          <table:table-cell office:value-type="string" calcext:value-type="string">
            <text:p>Influencing Other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fluencing Others 2019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aving Difficult Conversations</text:p>
          </table:table-cell>
          <table:table-cell office:value-type="string" calcext:value-type="string">
            <text:p>Interpersonal Communication Difficult Situation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Having Difficult Convers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versity, Inclusion, and Belonging</text:p>
          </table:table-cell>
          <table:table-cell office:value-type="string" calcext:value-type="string">
            <text:p>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Diversity Inclusion and Belonging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 an Inclusive Organization People Won't Leave</text:p>
          </table:table-cell>
          <table:table-cell office:value-type="string" calcext:value-type="string">
            <text:p>Organizational Culture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e an Inclusive Organization People Wont Leav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versity, Inclusion, and Belonging</text:p>
          </table:table-cell>
          <table:table-cell office:value-type="string" calcext:value-type="string">
            <text:p>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Diversity Inclusion and Belonging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aving Difficult Conversations</text:p>
          </table:table-cell>
          <table:table-cell office:value-type="string" calcext:value-type="string">
            <text:p>Interpersonal Communication Difficult Situation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Having Difficult Convers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 an Inclusive Organization People Won't Leave</text:p>
          </table:table-cell>
          <table:table-cell office:value-type="string" calcext:value-type="string">
            <text:p>Organizational Culture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e an Inclusive Organization People Wont Leave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ritical Thinking for Better Judgment and Decision-Making</text:p>
          </table:table-cell>
          <table:table-cell office:value-type="string" calcext:value-type="string">
            <text:p>Critical Thinking Decision-Making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Critical Thinking for Better Judgment and DecisionMaking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clusive Mindset</text:p>
          </table:table-cell>
          <table:table-cell office:value-type="string" calcext:value-type="string">
            <text:p>Inclusive Team Leadership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clusive Mindse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versity, Inclusion, and Belonging</text:p>
          </table:table-cell>
          <table:table-cell office:value-type="string" calcext:value-type="string">
            <text:p>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Diversity Inclusion and Belonging-4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 an Inclusive Organization People Won't Leave</text:p>
          </table:table-cell>
          <table:table-cell office:value-type="string" calcext:value-type="string">
            <text:p>Organizational Culture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e an Inclusive Organization People Wont Leave-4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ritical Thinking for Better Judgment and Decision-Making</text:p>
          </table:table-cell>
          <table:table-cell office:value-type="string" calcext:value-type="string">
            <text:p>Critical Thinking Decision-Making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Critical Thinking for Better Judgment and DecisionMak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siness Writing Principles</text:p>
          </table:table-cell>
          <table:table-cell office:value-type="string" calcext:value-type="string">
            <text:p>Business Writing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usiness Writing Principle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versity, Inclusion, and Belonging</text:p>
          </table:table-cell>
          <table:table-cell office:value-type="string" calcext:value-type="string">
            <text:p>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Diversity Inclusion and Belong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conscious Bias</text:p>
          </table:table-cell>
          <table:table-cell office:value-type="string" calcext:value-type="string">
            <text:p>Unconscious Bias Awareness Training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Unconscious Bia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quity First: The Path to Inclusion and Belonging</text:p>
          </table:table-cell>
          <table:table-cell office:value-type="string" calcext:value-type="string">
            <text:p>Social Equity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Equity First The Path to Inclusion and Belong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nflict Resolution Foundations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Conflict Resolution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Email</text:p>
          </table:table-cell>
          <table:table-cell office:value-type="string" calcext:value-type="string">
            <text:p>Email Etiquette Professional Communicat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Writing Email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fluencing Others (2019)</text:p>
          </table:table-cell>
          <table:table-cell office:value-type="string" calcext:value-type="string">
            <text:p>Influencing Other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fluencing Others 2019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 an Inclusive Organization People Won't Leave</text:p>
          </table:table-cell>
          <table:table-cell office:value-type="string" calcext:value-type="string">
            <text:p>Organizational Culture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e an Inclusive Organization People Wont Leav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Career Skills in Software Development</text:p>
          </table:table-cell>
          <table:table-cell office:value-type="string" calcext:value-type="string">
            <text:p>Software Development Career Management Tech Career Skill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troduction to Career Skills in Software Development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Formal Business Letters and Emails</text:p>
          </table:table-cell>
          <table:table-cell office:value-type="string" calcext:value-type="string">
            <text:p>Business Communication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Writing Formal Business Letters and Email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ading Your Org on a Journey of Allyship</text:p>
          </table:table-cell>
          <table:table-cell office:value-type="string" calcext:value-type="string">
            <text:p>Allyship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Leading Your Org on a Journey of Allyship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Career Skills in Software Development</text:p>
          </table:table-cell>
          <table:table-cell office:value-type="string" calcext:value-type="string">
            <text:p>Software Development Career Management Tech Career Skill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troduction to Career Skills in Software Development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rammarly: Your AI Writing Partner</text:p>
          </table:table-cell>
          <table:table-cell office:value-type="string" calcext:value-type="string">
            <text:p>AI Productivity Artificial Intelligence (AI) Grammarly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Grammarly Your AI Writing Partner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ading Your Org on a Journey of Allyship</text:p>
          </table:table-cell>
          <table:table-cell office:value-type="string" calcext:value-type="string">
            <text:p>Allyship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Leading Your Org on a Journey of Allyship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ing Positive at Work</text:p>
          </table:table-cell>
          <table:table-cell office:value-type="string" calcext:value-type="string">
            <text:p>Positive Psychology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eing Positive at Work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Career Skills in Software Development</text:p>
          </table:table-cell>
          <table:table-cell office:value-type="string" calcext:value-type="string">
            <text:p>Software Development Career Management Tech Career Skill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troduction to Career Skills in Software Development-3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kills for Inclusive Conversations</text:p>
          </table:table-cell>
          <table:table-cell office:value-type="string" calcext:value-type="string">
            <text:p>Interpersonal Communication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Skills for Inclusive Convers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Career Skills in Software Development</text:p>
          </table:table-cell>
          <table:table-cell office:value-type="string" calcext:value-type="string">
            <text:p>Software Development Career Management Tech Career Skill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troduction to Career Skills in Software Development-4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Career Skills in Software Development</text:p>
          </table:table-cell>
          <table:table-cell office:value-type="string" calcext:value-type="string">
            <text:p>Software Development Career Management Tech Career Skill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Introduction to Career Skills in Software Development-5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kills for Inclusive Conversations</text:p>
          </table:table-cell>
          <table:table-cell office:value-type="string" calcext:value-type="string">
            <text:p>Interpersonal Communication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Skills for Inclusive Conversations-6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mmunicating about Culturally Sensitive Issues</text:p>
          </table:table-cell>
          <table:table-cell office:value-type="string" calcext:value-type="string">
            <text:p>Sensitive Issues Cross-Cultural Communicat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Communicating about Culturally Sensitive Issue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locking Authentic Communication in a Culturally-Diverse Workplace</text:p>
          </table:table-cell>
          <table:table-cell office:value-type="string" calcext:value-type="string">
            <text:p>Professional Communication Cross-Cultural Communicat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Unlocking Authentic Communication in a CulturallyDiverse Workplace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naging Stress for Positive Change (2022)</text:p>
          </table:table-cell>
          <table:table-cell office:value-type="string" calcext:value-type="string">
            <text:p>Stress Management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Managing Stress for Positive Change 2022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siness Writing Principles</text:p>
          </table:table-cell>
          <table:table-cell office:value-type="string" calcext:value-type="string">
            <text:p>Business Writing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usiness Writing Principl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mmunicating about Culturally Sensitive Issues</text:p>
          </table:table-cell>
          <table:table-cell office:value-type="string" calcext:value-type="string">
            <text:p>Sensitive Issues Cross-Cultural Communicat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Communicating about Culturally Sensitive Issues-3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Formal Business Letters and Emails</text:p>
          </table:table-cell>
          <table:table-cell office:value-type="string" calcext:value-type="string">
            <text:p>Business Communication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Writing Formal Business Letters and Email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locking Authentic Communication in a Culturally-Diverse Workplace</text:p>
          </table:table-cell>
          <table:table-cell office:value-type="string" calcext:value-type="string">
            <text:p>Professional Communication Cross-Cultural Communicat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Unlocking Authentic Communication in a CulturallyDiverse Workplac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kills for Inclusive Conversations</text:p>
          </table:table-cell>
          <table:table-cell office:value-type="string" calcext:value-type="string">
            <text:p>Interpersonal Communication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Skills for Inclusive Conversations-4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ommunicating with Confidence</text:p>
          </table:table-cell>
          <table:table-cell office:value-type="string" calcext:value-type="string">
            <text:p>Communication Confidence Building Self-confidence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Communicating with Confidenc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ing Positive at Work</text:p>
          </table:table-cell>
          <table:table-cell office:value-type="string" calcext:value-type="string">
            <text:p>Positive Psychology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Being Positive at Work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Create Executive-Level Data Visualizations</text:p>
          </table:table-cell>
          <table:table-cell office:value-type="string" calcext:value-type="string">
            <text:p>Data Visualization Executive Presentation Skills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How to Create ExecutiveLevel Data Visualiz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Support Colleagues from Underrepresented Groups</text:p>
          </table:table-cell>
          <table:table-cell office:value-type="string" calcext:value-type="string">
            <text:p>Workplace Relations Allyship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How to Support Colleagues from Underrepresented Group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kills for Inclusive Conversations</text:p>
          </table:table-cell>
          <table:table-cell office:value-type="string" calcext:value-type="string">
            <text:p>Interpersonal Communication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Skills for Inclusive Conversations-3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quity First: The Path to Inclusion and Belonging</text:p>
          </table:table-cell>
          <table:table-cell office:value-type="string" calcext:value-type="string">
            <text:p>Social Equity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Equity First The Path to Inclusion and Belonging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naging Stress for Positive Change (2022)</text:p>
          </table:table-cell>
          <table:table-cell office:value-type="string" calcext:value-type="string">
            <text:p>Stress Management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Managing Stress for Positive Change 202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ecision-Making Strategies</text:p>
          </table:table-cell>
          <table:table-cell office:value-type="string" calcext:value-type="string">
            <text:p>Decision-Making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DecisionMaking Strategi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Support Colleagues from Underrepresented Groups</text:p>
          </table:table-cell>
          <table:table-cell office:value-type="string" calcext:value-type="string">
            <text:p>Workplace Relations Allyship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How to Support Colleagues from Underrepresented Group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kills for Inclusive Conversations</text:p>
          </table:table-cell>
          <table:table-cell office:value-type="string" calcext:value-type="string">
            <text:p>Interpersonal Communication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Skills for Inclusive Conversation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conscious Bias</text:p>
          </table:table-cell>
          <table:table-cell office:value-type="string" calcext:value-type="string">
            <text:p>Unconscious Bias Awareness Training Diversity and Inclusion</text:p>
          </table:table-cell>
          <table:table-cell office:value-type="string" calcext:value-type="string">
            <text:p>LinkedIn Learning</text:p>
          </table:table-cell>
          <table:table-cell/>
          <table:table-cell office:value-type="string" calcext:value-type="string">
            <text:p>CertificateOfCompletion_Unconscious Bias-1.pdf</text:p>
          </table:table-cell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Sheet1.A1:Sheet1.E9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16T11:15:21</meta:creation-date>
    <dc:date>2026-06-16T13:22:24.522172000</dc:date>
    <meta:generator>LibreOffice/26.2.3.2$MacOSX_AARCH64 LibreOffice_project/70e089b17412e4cb7773e41413306b17a2328c34</meta:generator>
    <meta:editing-duration>PT1M34S</meta:editing-duration>
    <meta:editing-cycles>1</meta:editing-cycles>
    <meta:document-statistic meta:table-count="1" meta:cell-count="404" meta:object-count="0"/>
    <meta:user-defined meta:name="AppVersion">3.1</meta:user-defined>
  </office:meta>
</office:document-meta>
</file>