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5689in"/>
    </style:style>
    <style:style style:name="co2" style:family="table-column">
      <style:table-column-properties fo:break-before="auto" style:column-width="3.0602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6043in"/>
    </style:style>
    <style:style style:name="co5" style:family="table-column">
      <style:table-column-properties fo:break-before="auto" style:column-width="2.5098in"/>
    </style:style>
    <style:style style:name="co6" style:family="table-column">
      <style:table-column-properties fo:break-before="auto" style:column-width="0.68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course_nam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skills_id</text:p>
          </table:table-cell>
          <table:table-cell office:value-type="string" calcext:value-type="string">
            <text:p>source_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dvance Your Skills in Python Learning Path</text:p>
          </table:table-cell>
          <table:table-cell office:value-type="string" calcext:value-type="string">
            <text:p>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2e071a067820357e06f9b232d7ea242b2584eb4e3a463d7ea92732e1931b98aa</text:p>
          </table:table-cell>
          <table:table-cell office:value-type="string" calcext:value-type="string">
            <text:p>CertificateOfCompletion_Advance Your Skills in Pytho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I for Nonprofits Professional Certificate by Microsoft Elevate LinkedIn and NetHope</text:p>
          </table:table-cell>
          <table:table-cell office:value-type="string" calcext:value-type="string">
            <text:p>AI for Business Artificial Intelligence (AI) Responsibl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9d28e61d6682b7633d64eea54d5c5299c0c84aaab7ab34a835316c8064c207a</text:p>
          </table:table-cell>
          <table:table-cell office:value-type="string" calcext:value-type="string">
            <text:p>CertificateOfCompletion_AI for Nonprofits Professional Certificate by Microsoft Elevate LinkedIn and NetHop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naconda Python for Data Science Professional Certificate</text:p>
          </table:table-cell>
          <table:table-cell office:value-type="string" calcext:value-type="string">
            <text:p>Data Analysis Python (Programming Language) Statistic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b2798024c86b918fd9843a284debc42fd5d8ec2a2c53a000d89cf91803a675b</text:p>
          </table:table-cell>
          <table:table-cell office:value-type="string" calcext:value-type="string">
            <text:p>CertificateOfCompletion_Anaconda Python for Data Science Professional Certificat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ecome a Programmer: Foundations Learning Path </text:p>
          </table:table-cell>
          <table:table-cell office:value-type="string" calcext:value-type="string">
            <text:p>Programming Programming Concept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135e8ca724f49bed5493c928ef9206ed4f8e478f0110d8d1f53f4361755afaf6</text:p>
          </table:table-cell>
          <table:table-cell office:value-type="string" calcext:value-type="string">
            <text:p>CertificateOfCompletion_Become a Programmer Foundation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uilding AI Products Prototyping Essentials Professional Certificate by LinkedIn Learning</text:p>
          </table:table-cell>
          <table:table-cell office:value-type="string" calcext:value-type="string">
            <text:p>AI Procurement Data Engineering AI Strategy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fa73ce4d05deedc3576b8e732e0d08d98a527c1ef1c7ffe44af886a86e01eadc</text:p>
          </table:table-cell>
          <table:table-cell office:value-type="string" calcext:value-type="string">
            <text:p>CertificateOfCompletion_Building AI Products Prototyping Essentials Professional Certificate by LinkedIn Learn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usiness Writing Professional Certificate by Grammarly</text:p>
          </table:table-cell>
          <table:table-cell office:value-type="string" calcext:value-type="string">
            <text:p>Business Communications AI Productivity Business Writ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78260d6e2165d34865229e1dfc7d4cad8fc6ef5e881548d9b55b45eab4c1f03</text:p>
          </table:table-cell>
          <table:table-cell office:value-type="string" calcext:value-type="string">
            <text:p>CertificateOfCompletion_Business Writing Professional Certificate by Grammarly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areer Essentials in GitHub Professional Certificate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0940d2f892b872b8f80f5cfa450463f5d4f00c328fdf6cebce49262d13e5775b</text:p>
          </table:table-cell>
          <table:table-cell office:value-type="string" calcext:value-type="string">
            <text:p>CertificateOfCompletion_Career Essentials in GitHub Professional Certificat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areer Essentials in Software Development by Microsoft and LinkedIn</text:p>
          </table:table-cell>
          <table:table-cell office:value-type="string" calcext:value-type="string">
            <text:p>Programming Software Development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24200e9728db42fb3e8b83ac9519e2104c5144758ebcba920955601a33e866c1</text:p>
          </table:table-cell>
          <table:table-cell office:value-type="string" calcext:value-type="string">
            <text:p>CertificateOfCompletion_Career Essentials in Software Development by Microsoft and LinkedI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ata Analysis with Python and Pandas</text:p>
          </table:table-cell>
          <table:table-cell office:value-type="string" calcext:value-type="string">
            <text:p>Data Analysis Pandas (Software) Python (Programming Language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42313acdc0eee1d864c83e8e808d88d440c822f6fe7850ce8a6ee22ed4489850</text:p>
          </table:table-cell>
          <table:table-cell office:value-type="string" calcext:value-type="string">
            <text:p>CertificateOfCompletion_Data Analysis with Python and Pandas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EI Awareness Professional Certificate by LinkedIn Learning</text:p>
          </table:table-cell>
          <table:table-cell office:value-type="string" calcext:value-type="string">
            <text:p>Professional Communication Allyship Diversity and Inclusion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396dbe522a0531b60e138cc2918e361a5ec7566f889203e526833e56227f8ee</text:p>
          </table:table-cell>
          <table:table-cell office:value-type="string" calcext:value-type="string">
            <text:p>CertificateOfCompletion_DEI Awareness Professional Certificate by LinkedIn Learn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ssential Business Communication Skills Professional Certificate by LinkedIn Learning</text:p>
          </table:table-cell>
          <table:table-cell office:value-type="string" calcext:value-type="string">
            <text:p>Conflict Resolution Interpersonal Communication Active Listen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7c967935a502e1b2a1feea92fe788f833fe6dc75966c5da6247b39023591dd23</text:p>
          </table:table-cell>
          <table:table-cell office:value-type="string" calcext:value-type="string">
            <text:p>CertificateOfCompletion_Essential Business Communication Skills Professional Certificate by LinkedIn Learn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achine Learning Statistical Foundations Professional Certificate by Wolfram Research</text:p>
          </table:table-cell>
          <table:table-cell office:value-type="string" calcext:value-type="string">
            <text:p>Wolfram Language Machine Learning Linear Algebra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d30e690540733ca06911f16b37d0816f600f272e44baa6812fc192599f7a4f93</text:p>
          </table:table-cell>
          <table:table-cell office:value-type="string" calcext:value-type="string">
            <text:p>CertificateOfCompletion_Machine Learning Statistical Foundations Professional Certificate by Wolfram Research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icrosoft 365 Copilot Essentials Professional Certificate by Microsoft and LinkedIn</text:p>
          </table:table-cell>
          <table:table-cell office:value-type="string" calcext:value-type="string">
            <text:p>Microsoft Copilot AI Productivity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2128bfdc6f33765eeedf7bf72b7909a97c23e9a013b8bafe95e4b6beb65b843b</text:p>
          </table:table-cell>
          <table:table-cell office:value-type="string" calcext:value-type="string">
            <text:p>CertificateOfCompletion_Microsoft 365 Copilot Essentials Professional Certificate by Microsoft and LinkedI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icrosoft Azure AI Essentials Professional Certificate by Microsoft and LinkedIn</text:p>
          </table:table-cell>
          <table:table-cell office:value-type="string" calcext:value-type="string">
            <text:p>Machine Learning Azure AI Studio Generativ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0a23d6f79b84a538e59789d3af96ca0d63bb0bda527af5f56f4f4d09991dcf2</text:p>
          </table:table-cell>
          <table:table-cell office:value-type="string" calcext:value-type="string">
            <text:p>CertificateOfCompletion_Microsoft Azure AI Essentials Professional Certificate by Microsoft and LinkedI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icrosoft Azure Essentials Professional Certificate by Microsoft and LinkedIn</text:p>
          </table:table-cell>
          <table:table-cell office:value-type="string" calcext:value-type="string">
            <text:p>Microsoft Azure Cloud Computing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91cae8476573c9aba1250be60246a20946ce243f21d140a57117b92d541373d4</text:p>
          </table:table-cell>
          <table:table-cell office:value-type="string" calcext:value-type="string">
            <text:p>CertificateOfCompletion_Microsoft Azure Essentials Professional Certificate by Microsoft and LinkedI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Negotiation Professional Certificate by American Negotiation Institute</text:p>
          </table:table-cell>
          <table:table-cell office:value-type="string" calcext:value-type="string">
            <text:p>Negotiation Strategic Negotiations Interpersonal Skill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f3d8e3496e39c3b1470cfd10f00f5a9f4154d230c6bbf7372c271f9f5cc9c8f1</text:p>
          </table:table-cell>
          <table:table-cell office:value-type="string" calcext:value-type="string">
            <text:p>CertificateOfCompletion_Negotiation Professional Certificate by American Negotiation Institut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OpenEDG Python Institute Programming with Python Professional Certificate</text:p>
          </table:table-cell>
          <table:table-cell office:value-type="string" calcext:value-type="string">
            <text:p>Python (Programming Language) Object-Oriented Programming (OOP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bf79c68333f9ebbfd3630175ee1008d238ae0edd88fe23f6dceb05a30a8b6674</text:p>
          </table:table-cell>
          <table:table-cell office:value-type="string" calcext:value-type="string">
            <text:p>CertificateOfCompletion_OpenEDG Python Institute Programming with Python Professional Certificat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ublic Speaking Skills Professional Certificate by Toastmasters International</text:p>
          </table:table-cell>
          <table:table-cell office:value-type="string" calcext:value-type="string">
            <text:p>Speech Writing Public Speaking Presentation Skill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c02beb6a15bc7cefd5bfdc495bfe3678175316934c69961cdb6bcd6448487e08</text:p>
          </table:table-cell>
          <table:table-cell office:value-type="string" calcext:value-type="string">
            <text:p>CertificateOfCompletion_Public Speaking Skills Professional Certificate by Toastmasters International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for Data Science and Machine Learning Essential Training Part 1</text:p>
          </table:table-cell>
          <table:table-cell office:value-type="string" calcext:value-type="string">
            <text:p>Machine Learning Python (Programming Language)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21cf594bbdce4c3b6edb46d4d60c96d97bf728944095edc65484f23a7c7e6cf</text:p>
          </table:table-cell>
          <table:table-cell office:value-type="string" calcext:value-type="string">
            <text:p>CertificateOfCompletion_Python for Data Science and Machine Learning Essential Training Part 1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for Data Science and Machine Learning Essential Training Part 2</text:p>
          </table:table-cell>
          <table:table-cell office:value-type="string" calcext:value-type="string">
            <text:p>Machine Learning Python (Programming Language) Artificial Intelligence (AI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6970c0c8d9bd11134b31bfdbb091824ff0a5b5ff5bf34ded21bf5082ff66253c</text:p>
          </table:table-cell>
          <table:table-cell office:value-type="string" calcext:value-type="string">
            <text:p>CertificateOfCompletion_Python for Data Science and Machine Learning Essential Training Part 2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Hands-On Practice Learning Path </text:p>
          </table:table-cell>
          <table:table-cell office:value-type="string" calcext:value-type="string">
            <text:p>Python (Programming Language) Coding Practices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f9d2faa9822ab5543887db8b078d1b0e3cb509729eca5a55eebb68fdbe21622</text:p>
          </table:table-cell>
          <table:table-cell office:value-type="string" calcext:value-type="string">
            <text:p>CertificateOfCompletion_Python HandsOn Practice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ython Practice: Object-Oriented Programming</text:p>
          </table:table-cell>
          <table:table-cell office:value-type="string" calcext:value-type="string">
            <text:p>Python (Programming Language) Object-Oriented Programming (OOP)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ab7d3665e0e14f27a611a60ef73077be4d6829ec4e6b09d64e2d289e70808ff6</text:p>
          </table:table-cell>
          <table:table-cell office:value-type="string" calcext:value-type="string">
            <text:p>CertificateOfCompletion_Python Practice ObjectOriented Programming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Responsible AI Foundations Professional Certificate by All Tech Is Human</text:p>
          </table:table-cell>
          <table:table-cell office:value-type="string" calcext:value-type="string">
            <text:p>Governance, Risk Management, and Compliance (GRC) Artificial Intelligence (AI) Responsibl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3ed9f4cf3bdf0bc68326de00fc48a572cd47b3da1973581becdb3768eded2b9</text:p>
          </table:table-cell>
          <table:table-cell office:value-type="string" calcext:value-type="string">
            <text:p>CertificateOfCompletion_Responsible AI Foundations Professional Certificate by All Tech Is Human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Responsible AI in a Global Context Professional Certificate by the United Nations University</text:p>
          </table:table-cell>
          <table:table-cell office:value-type="string" calcext:value-type="string">
            <text:p>AI Policy, Governance, and Regulation Artificial Intelligence (AI) Responsible AI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5f1b7170bb0b36ee7a4ab7061e35ae3575ac4c3dc5d9037d39d81a3d98f0cc2e</text:p>
          </table:table-cell>
          <table:table-cell office:value-type="string" calcext:value-type="string">
            <text:p>CertificateOfCompletion_Responsible AI in a Global Context Professional Certificate by the United Nations University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tatistics Foundations Professional Certificate by Wolfram Research</text:p>
          </table:table-cell>
          <table:table-cell office:value-type="string" calcext:value-type="string">
            <text:p>Wolfram Language Statistics Microsoft Excel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8cc43d091586210d872e1ad100f7fc3f0f2a05e15908b3df690b0910613f48db</text:p>
          </table:table-cell>
          <table:table-cell office:value-type="string" calcext:value-type="string">
            <text:p>CertificateOfCompletion_Statistics Foundations Professional Certificate by Wolfram Research.pdf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Ubuntu Linux Professional Certificate by Canonical</text:p>
          </table:table-cell>
          <table:table-cell office:value-type="string" calcext:value-type="string">
            <text:p>Linux System Administration User Management Ubuntu</text:p>
          </table:table-cell>
          <table:table-cell office:value-type="string" calcext:value-type="string">
            <text:p>LinkedIn Learning</text:p>
          </table:table-cell>
          <table:table-cell office:value-type="string" calcext:value-type="string">
            <text:p>3914b50f6ae43c170139bef05a25a819701fff60c7a83874466688c75464b7fa</text:p>
          </table:table-cell>
          <table:table-cell office:value-type="string" calcext:value-type="string">
            <text:p>CertificateOfCompletion_Ubuntu Linux Professional Certificate by Canonical.pdf</text:p>
          </table:table-cell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Sheet1.A1:Sheet1.E2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 loext:blank-width-char="-1">-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19:02:07.80196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6-16T10:53:40</meta:creation-date>
    <dc:date>2026-06-16T19:04:14.172471000</dc:date>
    <meta:generator>LibreOffice/26.2.3.2$MacOSX_AARCH64 LibreOffice_project/70e089b17412e4cb7773e41413306b17a2328c34</meta:generator>
    <meta:editing-duration>PT11M56S</meta:editing-duration>
    <meta:editing-cycles>4</meta:editing-cycles>
    <meta:document-statistic meta:table-count="1" meta:cell-count="135" meta:object-count="0"/>
    <meta:user-defined meta:name="AppVersion">3.1</meta:user-defined>
  </office:meta>
</office:document-meta>
</file>